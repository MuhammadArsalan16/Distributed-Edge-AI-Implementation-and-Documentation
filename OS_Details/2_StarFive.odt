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>
      <style:paragraph-properties fo:margin-top="0.3335in" fo:margin-bottom="0.1965in" style:contextual-spacing="false"/>
    </style:style>
    <style:style style:name="P2" style:family="paragraph" style:parent-style-name="Heading_20_2">
      <style:paragraph-properties fo:margin-top="0.139in" fo:margin-bottom="0.1965in" style:contextual-spacing="false"/>
    </style:style>
    <style:style style:name="P3" style:family="paragraph" style:parent-style-name="Text_20_body" style:list-style-name="WWNum7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4" style:family="paragraph" style:parent-style-name="Text_20_body" style:list-style-name="WWNum7">
      <style:paragraph-properties fo:margin-left="0.9846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5" style:family="paragraph" style:parent-style-name="Text_20_body" style:list-style-name="WWNum7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6" style:family="paragraph" style:parent-style-name="Horizontal_20_Line">
      <style:text-properties fo:color="#000000" loext:opacity="100%" style:font-name="Calibri"/>
    </style:style>
    <style:style style:name="P7" style:family="paragraph" style:parent-style-name="Text_20_body" style:list-style-name="WWNum8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8" style:family="paragraph" style:parent-style-name="Text_20_body" style:list-style-name="WWNum8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9" style:family="paragraph" style:parent-style-name="Heading_20_3">
      <style:paragraph-properties fo:margin-top="0.139in" fo:margin-bottom="0.1965in" style:contextual-spacing="false"/>
    </style:style>
    <style:style style:name="P10" style:family="paragraph" style:parent-style-name="Text_20_body" style:list-style-name="WWNum9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11" style:family="paragraph" style:parent-style-name="Text_20_body" style:list-style-name="WWNum9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12" style:family="paragraph" style:parent-style-name="Text_20_body" style:list-style-name="WWNum10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13" style:family="paragraph" style:parent-style-name="Text_20_body" style:list-style-name="WWNum10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14" style:family="paragraph" style:parent-style-name="Text_20_body" style:list-style-name="WWNum11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15" style:family="paragraph" style:parent-style-name="Text_20_body" style:list-style-name="WWNum11">
      <style:paragraph-properties fo:margin-left="0.9846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16" style:family="paragraph" style:parent-style-name="Text_20_body" style:list-style-name="WWNum11">
      <style:paragraph-properties fo:margin-left="0.9846in" fo:text-indent="-0.1965in" style:auto-text-indent="false">
        <style:tab-stops>
          <style:tab-stop style:position="0in"/>
        </style:tab-stops>
      </style:paragraph-properties>
    </style:style>
    <style:style style:name="P17" style:family="paragraph" style:parent-style-name="Text_20_body" style:list-style-name="WWNum12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18" style:family="paragraph" style:parent-style-name="Text_20_body" style:list-style-name="WWNum12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19" style:family="paragraph" style:parent-style-name="Text_20_body" style:list-style-name="WWNum13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20" style:family="paragraph" style:parent-style-name="Text_20_body" style:list-style-name="WWNum13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21" style:family="paragraph" style:parent-style-name="Text_20_body" style:list-style-name="WWNum14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22" style:family="paragraph" style:parent-style-name="Text_20_body" style:list-style-name="WWNum14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23" style:family="paragraph" style:parent-style-name="Standard">
      <style:paragraph-properties fo:margin-top="0.139in" fo:margin-bottom="0.1965in" style:contextual-spacing="false"/>
      <style:text-properties fo:color="#000000" loext:opacity="100%" style:font-name="Calibri"/>
    </style:style>
    <style:style style:name="P24" style:family="paragraph" style:parent-style-name="Text_20_body" style:list-style-name="WWNum15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25" style:family="paragraph" style:parent-style-name="Text_20_body" style:list-style-name="WWNum15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26" style:family="paragraph" style:parent-style-name="Text_20_body" style:list-style-name="WWNum16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27" style:family="paragraph" style:parent-style-name="Text_20_body" style:list-style-name="WWNum16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28" style:family="paragraph" style:parent-style-name="Text_20_body" style:list-style-name="WWNum17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29" style:family="paragraph" style:parent-style-name="Text_20_body" style:list-style-name="WWNum17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30" style:family="paragraph" style:parent-style-name="Text_20_body" style:list-style-name="WWNum18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31" style:family="paragraph" style:parent-style-name="Text_20_body" style:list-style-name="WWNum18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32" style:family="paragraph" style:parent-style-name="Text_20_body" style:list-style-name="WWNum19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33" style:family="paragraph" style:parent-style-name="Text_20_body" style:list-style-name="WWNum19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34" style:family="paragraph" style:parent-style-name="Text_20_body" style:list-style-name="WWNum20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35" style:family="paragraph" style:parent-style-name="Text_20_body" style:list-style-name="WWNum20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36" style:family="paragraph" style:parent-style-name="Text_20_body" style:list-style-name="WWNum21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37" style:family="paragraph" style:parent-style-name="Text_20_body" style:list-style-name="WWNum21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38" style:family="paragraph" style:parent-style-name="Text_20_body" style:list-style-name="WWNum22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39" style:family="paragraph" style:parent-style-name="Text_20_body" style:list-style-name="WWNum22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40" style:family="paragraph" style:parent-style-name="Text_20_body" style:list-style-name="WWNum23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41" style:family="paragraph" style:parent-style-name="Text_20_body" style:list-style-name="WWNum23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42" style:family="paragraph" style:parent-style-name="Preformatted_20_Text">
      <style:text-properties fo:color="#000000" loext:opacity="100%" style:font-name="Calibri"/>
    </style:style>
    <style:style style:name="P43" style:family="paragraph" style:parent-style-name="Preformatted_20_Text">
      <style:paragraph-properties fo:margin-top="0in" fo:margin-bottom="0.1965in" style:contextual-spacing="false"/>
    </style:style>
    <style:style style:name="P44" style:family="paragraph" style:parent-style-name="Text_20_body" style:list-style-name="WWNum24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45" style:family="paragraph" style:parent-style-name="Text_20_body" style:list-style-name="WWNum24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46" style:family="paragraph" style:parent-style-name="Text_20_body" style:list-style-name="WWNum25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47" style:family="paragraph" style:parent-style-name="Text_20_body" style:list-style-name="WWNum25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48" style:family="paragraph" style:parent-style-name="Text_20_body" style:list-style-name="WWNum26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49" style:family="paragraph" style:parent-style-name="Text_20_body" style:list-style-name="WWNum26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50" style:family="paragraph" style:parent-style-name="Text_20_body" style:list-style-name="WWNum27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51" style:family="paragraph" style:parent-style-name="Text_20_body" style:list-style-name="WWNum27">
      <style:paragraph-properties fo:margin-left="0.9846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52" style:family="paragraph" style:parent-style-name="Text_20_body" style:list-style-name="WWNum27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53" style:family="paragraph" style:parent-style-name="Text_20_body" style:list-style-name="WWNum28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54" style:family="paragraph" style:parent-style-name="Text_20_body" style:list-style-name="WWNum28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55" style:family="paragraph" style:parent-style-name="Text_20_body" style:list-style-name="WWNum29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56" style:family="paragraph" style:parent-style-name="Text_20_body" style:list-style-name="WWNum29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57" style:family="paragraph" style:parent-style-name="Text_20_body" style:list-style-name="WWNum30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58" style:family="paragraph" style:parent-style-name="Text_20_body" style:list-style-name="WWNum30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59" style:family="paragraph" style:parent-style-name="Text_20_body" style:list-style-name="WWNum31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60" style:family="paragraph" style:parent-style-name="Text_20_body" style:list-style-name="WWNum31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61" style:family="paragraph" style:parent-style-name="Text_20_body" style:list-style-name="WWNum32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62" style:family="paragraph" style:parent-style-name="Text_20_body" style:list-style-name="WWNum32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63" style:family="paragraph" style:parent-style-name="Text_20_body" style:list-style-name="WWNum33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64" style:family="paragraph" style:parent-style-name="Text_20_body" style:list-style-name="WWNum33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65" style:family="paragraph" style:parent-style-name="Text_20_body" style:list-style-name="WWNum34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66" style:family="paragraph" style:parent-style-name="Text_20_body" style:list-style-name="WWNum34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67" style:family="paragraph" style:parent-style-name="Text_20_body" style:list-style-name="WWNum35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68" style:family="paragraph" style:parent-style-name="Text_20_body" style:list-style-name="WWNum35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69" style:family="paragraph" style:parent-style-name="Text_20_body" style:list-style-name="WWNum36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70" style:family="paragraph" style:parent-style-name="Text_20_body" style:list-style-name="WWNum36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71" style:family="paragraph" style:parent-style-name="Text_20_body">
      <style:paragraph-properties fo:margin-top="0in" fo:margin-bottom="0.0835in" style:contextual-spacing="false"/>
      <style:text-properties style:font-name="Calibri"/>
    </style:style>
    <style:style style:name="T1" style:family="text">
      <style:text-properties fo:color="#000000" loext:opacity="100%" style:font-name="Calibri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loext:opacity="100%" style:font-name="Calibri" fo:font-weight="bold" style:font-weight-asian="bold" style:font-weight-complex="bold"/>
    </style:style>
    <style:style style:name="T3" style:family="text">
      <style:text-properties fo:color="#000000" loext:opacity="100%" style:font-name="Calibri"/>
    </style:style>
    <style:style style:name="T4" style:family="text">
      <style:text-properties fo:color="#000080" loext:opacity="100%" style:font-name="Calibri"/>
    </style:style>
    <style:style style:name="T5" style:family="text">
      <style:text-properties style:font-name="Calib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StarFive VisionFive 2 Linux Installation Guide</text:span></text:span></text:h>
      <text:h text:style-name="P2" text:outline-level="2"><text:span text:style-name="Strong_20_Emphasis"><text:span text:style-name="T2">Table of Contents</text:span></text:span></text:h>
      <text:list text:style-name="WWNum7">
        <text:list-item>
          <text:p text:style-name="P3"><text:a xlink:type="simple" xlink:href="#1-about-starfive-visionfive-2" text:style-name="Internet_20_link" text:visited-style-name="Visited_20_Internet_20_Link"><text:span text:style-name="Internet_20_link"><text:span text:style-name="T3">About StarFive VisionFive 2</text:span></text:span></text:a><text:span text:style-name="T3"> </text:span></text:p>
        </text:list-item>
        <text:list-item>
          <text:p text:style-name="P3"><text:a xlink:type="simple" xlink:href="#2-system-specifications" text:style-name="Internet_20_link" text:visited-style-name="Visited_20_Internet_20_Link"><text:span text:style-name="Internet_20_link"><text:span text:style-name="T3">System Specifications</text:span></text:span></text:a><text:span text:style-name="T3"> </text:span></text:p>
          <text:list>
            <text:list-item>
              <text:p text:style-name="P4"><text:span text:style-name="T3">2.1 </text:span><text:a xlink:type="simple" xlink:href="#21-processor" text:style-name="Internet_20_link" text:visited-style-name="Visited_20_Internet_20_Link"><text:span text:style-name="Internet_20_link"><text:span text:style-name="T3">Processor</text:span></text:span></text:a><text:span text:style-name="T3"> </text:span></text:p>
            </text:list-item>
            <text:list-item>
              <text:p text:style-name="P4"><text:span text:style-name="T3">2.2 </text:span><text:a xlink:type="simple" xlink:href="#22-graphics" text:style-name="Internet_20_link" text:visited-style-name="Visited_20_Internet_20_Link"><text:span text:style-name="Internet_20_link"><text:span text:style-name="T3">Graphics</text:span></text:span></text:a><text:span text:style-name="T3"> </text:span></text:p>
            </text:list-item>
            <text:list-item>
              <text:p text:style-name="P4"><text:span text:style-name="T3">2.3 </text:span><text:a xlink:type="simple" xlink:href="#23-memory-options" text:style-name="Internet_20_link" text:visited-style-name="Visited_20_Internet_20_Link"><text:span text:style-name="Internet_20_link"><text:span text:style-name="T3">Memory Options</text:span></text:span></text:a><text:span text:style-name="T3"> </text:span></text:p>
            </text:list-item>
            <text:list-item>
              <text:p text:style-name="P4"><text:span text:style-name="T3">2.4 </text:span><text:a xlink:type="simple" xlink:href="#24-connectivity--io" text:style-name="Internet_20_link" text:visited-style-name="Visited_20_Internet_20_Link"><text:span text:style-name="Internet_20_link"><text:span text:style-name="T3">Connectivity &amp; I/O</text:span></text:span></text:a><text:span text:style-name="T3"> </text:span></text:p>
            </text:list-item>
            <text:list-item>
              <text:p text:style-name="P4"><text:span text:style-name="T3">2.5 </text:span><text:a xlink:type="simple" xlink:href="#25-storage-options" text:style-name="Internet_20_link" text:visited-style-name="Visited_20_Internet_20_Link"><text:span text:style-name="Internet_20_link"><text:span text:style-name="T3">Storage Options</text:span></text:span></text:a><text:span text:style-name="T3"> </text:span></text:p>
            </text:list-item>
            <text:list-item>
              <text:p text:style-name="P4"><text:span text:style-name="T3">2.6 </text:span><text:a xlink:type="simple" xlink:href="#26-power" text:style-name="Internet_20_link" text:visited-style-name="Visited_20_Internet_20_Link"><text:span text:style-name="Internet_20_link"><text:span text:style-name="T3">Power</text:span></text:span></text:a><text:span text:style-name="T3"> </text:span></text:p>
            </text:list-item>
          </text:list>
        </text:list-item>
        <text:list-item>
          <text:p text:style-name="P3"><text:a xlink:type="simple" xlink:href="#3-supported-operating-systems" text:style-name="Internet_20_link" text:visited-style-name="Visited_20_Internet_20_Link"><text:span text:style-name="Internet_20_link"><text:span text:style-name="T3">Supported Operating Systems</text:span></text:span></text:a><text:span text:style-name="T3"> </text:span></text:p>
          <text:list>
            <text:list-item>
              <text:p text:style-name="P4"><text:span text:style-name="T3">3.1 </text:span><text:a xlink:type="simple" xlink:href="#31-officially-supported-distributions" text:style-name="Internet_20_link" text:visited-style-name="Visited_20_Internet_20_Link"><text:span text:style-name="Internet_20_link"><text:span text:style-name="T3">Officially Supported Distributions</text:span></text:span></text:a><text:span text:style-name="T3"> </text:span></text:p>
            </text:list-item>
            <text:list-item>
              <text:p text:style-name="P4"><text:span text:style-name="T3">3.2 </text:span><text:a xlink:type="simple" xlink:href="#32-community-supported-distributions" text:style-name="Internet_20_link" text:visited-style-name="Visited_20_Internet_20_Link"><text:span text:style-name="Internet_20_link"><text:span text:style-name="T3">Community Supported Distributions</text:span></text:span></text:a><text:span text:style-name="T3"> </text:span></text:p>
            </text:list-item>
            <text:list-item>
              <text:p text:style-name="P4"><text:span text:style-name="T3">3.3 </text:span><text:a xlink:type="simple" xlink:href="#33-experimentaldevelopment-distributions" text:style-name="Internet_20_link" text:visited-style-name="Visited_20_Internet_20_Link"><text:span text:style-name="Internet_20_link"><text:span text:style-name="T3">Experimental/Development Distributions</text:span></text:span></text:a><text:span text:style-name="T3"> </text:span></text:p>
            </text:list-item>
          </text:list>
        </text:list-item>
        <text:list-item>
          <text:p text:style-name="P3"><text:a xlink:type="simple" xlink:href="#4-recommended-operating-system" text:style-name="Internet_20_link" text:visited-style-name="Visited_20_Internet_20_Link"><text:span text:style-name="Internet_20_link"><text:span text:style-name="T3">Recommended Operating System</text:span></text:span></text:a><text:span text:style-name="T3"> </text:span></text:p>
          <text:list>
            <text:list-item>
              <text:p text:style-name="P4"><text:span text:style-name="T3">4.1 </text:span><text:a xlink:type="simple" xlink:href="#41-for-beginners-ubuntu-2404-lts-server" text:style-name="Internet_20_link" text:visited-style-name="Visited_20_Internet_20_Link"><text:span text:style-name="Internet_20_link"><text:span text:style-name="T3">For Beginners: Ubuntu 24.04 LTS Server</text:span></text:span></text:a><text:span text:style-name="T3"> </text:span></text:p>
            </text:list-item>
            <text:list-item>
              <text:p text:style-name="P4"><text:span text:style-name="T3">4.2 </text:span><text:a xlink:type="simple" xlink:href="#42-for-advanced-users-debian" text:style-name="Internet_20_link" text:visited-style-name="Visited_20_Internet_20_Link"><text:span text:style-name="Internet_20_link"><text:span text:style-name="T3">For Advanced Users: Debian</text:span></text:span></text:a><text:span text:style-name="T3"> </text:span></text:p>
            </text:list-item>
            <text:list-item>
              <text:p text:style-name="P4"><text:span text:style-name="T3">4.3 </text:span><text:a xlink:type="simple" xlink:href="#43-for-development-ubuntu-server-2504" text:style-name="Internet_20_link" text:visited-style-name="Visited_20_Internet_20_Link"><text:span text:style-name="Internet_20_link"><text:span text:style-name="T3">For Development: Ubuntu Server 25.04</text:span></text:span></text:a><text:span text:style-name="T3"> </text:span></text:p>
            </text:list-item>
          </text:list>
        </text:list-item>
        <text:list-item>
          <text:p text:style-name="P3"><text:a xlink:type="simple" xlink:href="#5-installation-process" text:style-name="Internet_20_link" text:visited-style-name="Visited_20_Internet_20_Link"><text:span text:style-name="Internet_20_link"><text:span text:style-name="T3">Installation Process</text:span></text:span></text:a><text:span text:style-name="T3"> </text:span></text:p>
          <text:list>
            <text:list-item>
              <text:p text:style-name="P4"><text:span text:style-name="T3">5.1 </text:span><text:a xlink:type="simple" xlink:href="#51-prerequisites" text:style-name="Internet_20_link" text:visited-style-name="Visited_20_Internet_20_Link"><text:span text:style-name="Internet_20_link"><text:span text:style-name="T3">Prerequisites</text:span></text:span></text:a><text:span text:style-name="T3"> </text:span></text:p>
            </text:list-item>
            <text:list-item>
              <text:p text:style-name="P4"><text:span text:style-name="T3">5.2 </text:span><text:a xlink:type="simple" xlink:href="#52-step-1-download-the-operating-system-" text:style-name="Internet_20_link" text:visited-style-name="Visited_20_Internet_20_Link"><text:span text:style-name="Internet_20_link"><text:span text:style-name="T3">Step 1: Download the Operating System Image</text:span></text:span></text:a><text:span text:style-name="T3"> </text:span></text:p>
            </text:list-item>
            <text:list-item>
              <text:p text:style-name="P4"><text:span text:style-name="T3">5.3 </text:span><text:a xlink:type="simple" xlink:href="#53-step-2-verify-download-integrity" text:style-name="Internet_20_link" text:visited-style-name="Visited_20_Internet_20_Link"><text:span text:style-name="Internet_20_link"><text:span text:style-name="T3">Step 2: Verify Download Integrity</text:span></text:span></text:a><text:span text:style-name="T3"> </text:span></text:p>
            </text:list-item>
            <text:list-item>
              <text:p text:style-name="P4"><text:span text:style-name="T3">5.4 </text:span><text:a xlink:type="simple" xlink:href="#54-step-3-extract-the-image" text:style-name="Internet_20_link" text:visited-style-name="Visited_20_Internet_20_Link"><text:span text:style-name="Internet_20_link"><text:span text:style-name="T3">Step 3: Extract the Image</text:span></text:span></text:a><text:span text:style-name="T3"> </text:span></text:p>
            </text:list-item>
          </text:list>
        </text:list-item>
        <text:list-item>
          <text:p text:style-name="P3"><text:a xlink:type="simple" xlink:href="#6-creating-bootable-sd-card-on-macos" text:style-name="Internet_20_link" text:visited-style-name="Visited_20_Internet_20_Link"><text:span text:style-name="Internet_20_link"><text:span text:style-name="T3">Creating Bootable SD Card on macOS</text:span></text:span></text:a><text:span text:style-name="T3"> </text:span></text:p>
          <text:list>
            <text:list-item>
              <text:p text:style-name="P4"><text:span text:style-name="T3">6.1 </text:span><text:a xlink:type="simple" xlink:href="#61-method-1-using-balenaetcher-recommend" text:style-name="Internet_20_link" text:visited-style-name="Visited_20_Internet_20_Link"><text:span text:style-name="Internet_20_link"><text:span text:style-name="T3">Method 1: Using BalenaEtcher (Recommended for Beginners)</text:span></text:span></text:a><text:span text:style-name="T3"> </text:span></text:p>
            </text:list-item>
            <text:list-item>
              <text:p text:style-name="P4"><text:span text:style-name="T3">6.2 </text:span><text:a xlink:type="simple" xlink:href="#62-method-2-using-command-line-advanced-" text:style-name="Internet_20_link" text:visited-style-name="Visited_20_Internet_20_Link"><text:span text:style-name="Internet_20_link"><text:span text:style-name="T3">Method 2: Using Command Line (Advanced Users)</text:span></text:span></text:a><text:span text:style-name="T3"> </text:span></text:p>
            </text:list-item>
          </text:list>
        </text:list-item>
        <text:list-item>
          <text:p text:style-name="P3"><text:a xlink:type="simple" xlink:href="#7-boot-configuration-and-first-login" text:style-name="Internet_20_link" text:visited-style-name="Visited_20_Internet_20_Link"><text:span text:style-name="Internet_20_link"><text:span text:style-name="T3">Boot Configuration and First Login</text:span></text:span></text:a><text:span text:style-name="T3"> </text:span></text:p>
          <text:list>
            <text:list-item>
              <text:p text:style-name="P4"><text:span text:style-name="T3">7.1 </text:span><text:a xlink:type="simple" xlink:href="#71-step-1-configure-boot-mode" text:style-name="Internet_20_link" text:visited-style-name="Visited_20_Internet_20_Link"><text:span text:style-name="Internet_20_link"><text:span text:style-name="T3">Step 1: Configure Boot Mode</text:span></text:span></text:a><text:span text:style-name="T3"> </text:span></text:p>
            </text:list-item>
            <text:list-item>
              <text:p text:style-name="P4"><text:span text:style-name="T3">7.2 </text:span><text:a xlink:type="simple" xlink:href="#72-step-2-hardware-setup" text:style-name="Internet_20_link" text:visited-style-name="Visited_20_Internet_20_Link"><text:span text:style-name="Internet_20_link"><text:span text:style-name="T3">Step 2: Hardware Setup</text:span></text:span></text:a><text:span text:style-name="T3"> </text:span></text:p>
            </text:list-item>
            <text:list-item>
              <text:p text:style-name="P4"><text:span text:style-name="T3">7.3 </text:span><text:a xlink:type="simple" xlink:href="#73-step-3-first-boot" text:style-name="Internet_20_link" text:visited-style-name="Visited_20_Internet_20_Link"><text:span text:style-name="Internet_20_link"><text:span text:style-name="T3">Step 3: First Boot</text:span></text:span></text:a><text:span text:style-name="T3"> </text:span></text:p>
            </text:list-item>
            <text:list-item>
              <text:p text:style-name="P4"><text:span text:style-name="T3">7.4 </text:span><text:a xlink:type="simple" xlink:href="#74-step-4-login-credentials" text:style-name="Internet_20_link" text:visited-style-name="Visited_20_Internet_20_Link"><text:span text:style-name="Internet_20_link"><text:span text:style-name="T3">Step 4: Login Credentials</text:span></text:span></text:a><text:span text:style-name="T3"> </text:span></text:p>
            </text:list-item>
            <text:list-item>
              <text:p text:style-name="P4"><text:span text:style-name="T3">7.5 </text:span><text:a xlink:type="simple" xlink:href="#75-step-5-initial-setup" text:style-name="Internet_20_link" text:visited-style-name="Visited_20_Internet_20_Link"><text:span text:style-name="Internet_20_link"><text:span text:style-name="T3">Step 5: Initial Setup</text:span></text:span></text:a><text:span text:style-name="T3"> </text:span></text:p>
            </text:list-item>
          </text:list>
        </text:list-item>
        <text:list-item>
          <text:p text:style-name="P3"><text:a xlink:type="simple" xlink:href="#8-post-installation-setup" text:style-name="Internet_20_link" text:visited-style-name="Visited_20_Internet_20_Link"><text:span text:style-name="Internet_20_link"><text:span text:style-name="T3">Post-Installation Setup</text:span></text:span></text:a><text:span text:style-name="T3"> </text:span></text:p>
          <text:list>
            <text:list-item>
              <text:p text:style-name="P4"><text:span text:style-name="T3">8.1 </text:span><text:a xlink:type="simple" xlink:href="#81-system-updates" text:style-name="Internet_20_link" text:visited-style-name="Visited_20_Internet_20_Link"><text:span text:style-name="Internet_20_link"><text:span text:style-name="T3">System Updates</text:span></text:span></text:a><text:span text:style-name="T3"> </text:span></text:p>
            </text:list-item>
            <text:list-item>
              <text:p text:style-name="P4"><text:soft-page-break/><text:span text:style-name="T3">8.2 </text:span><text:a xlink:type="simple" xlink:href="#84-performance-optimization" text:style-name="Internet_20_link" text:visited-style-name="Visited_20_Internet_20_Link"><text:span text:style-name="Internet_20_link"><text:span text:style-name="T3">Performance Optimization</text:span></text:span></text:a><text:span text:style-name="T3"> </text:span></text:p>
            </text:list-item>
          </text:list>
        </text:list-item>
        <text:list-item>
          <text:p text:style-name="P3"><text:a xlink:type="simple" xlink:href="#9-troubleshooting" text:style-name="Internet_20_link" text:visited-style-name="Visited_20_Internet_20_Link"><text:span text:style-name="Internet_20_link"><text:span text:style-name="T3">Troubleshooting</text:span></text:span></text:a><text:span text:style-name="T3"> </text:span></text:p>
          <text:list>
            <text:list-item>
              <text:p text:style-name="P4"><text:span text:style-name="T3">9.1 </text:span><text:a xlink:type="simple" xlink:href="#91-common-issues-and-solutions" text:style-name="Internet_20_link" text:visited-style-name="Visited_20_Internet_20_Link"><text:span text:style-name="Internet_20_link"><text:span text:style-name="T3">Common Issues and Solutions</text:span></text:span></text:a><text:span text:style-name="T3"> </text:span></text:p>
            </text:list-item>
            <text:list-item>
              <text:p text:style-name="P4"><text:span text:style-name="T3">9.2 </text:span><text:a xlink:type="simple" xlink:href="#92-boot-issues" text:style-name="Internet_20_link" text:visited-style-name="Visited_20_Internet_20_Link"><text:span text:style-name="Internet_20_link"><text:span text:style-name="T3">Boot Issues</text:span></text:span></text:a><text:span text:style-name="T3"> </text:span></text:p>
            </text:list-item>
            <text:list-item>
              <text:p text:style-name="P4"><text:span text:style-name="T3">9.3 </text:span><text:a xlink:type="simple" xlink:href="#93-display-issues" text:style-name="Internet_20_link" text:visited-style-name="Visited_20_Internet_20_Link"><text:span text:style-name="Internet_20_link"><text:span text:style-name="T4">Display Issue</text:span></text:span></text:a><text:span text:style-name="Internet_20_link"><text:span text:style-name="T3">s</text:span></text:span></text:p>
            </text:list-item>
          </text:list>
        </text:list-item>
        <text:list-item>
          <text:p text:style-name="P3"><text:a xlink:type="simple" xlink:href="#10-getting-help" text:style-name="Internet_20_link" text:visited-style-name="Visited_20_Internet_20_Link"><text:span text:style-name="Internet_20_link"><text:span text:style-name="T3">Getting Help</text:span></text:span></text:a><text:span text:style-name="T3"> </text:span></text:p>
          <text:list>
            <text:list-item>
              <text:p text:style-name="P4"><text:span text:style-name="T3">10.1 </text:span><text:a xlink:type="simple" xlink:href="#101-official-resources" text:style-name="Internet_20_link" text:visited-style-name="Visited_20_Internet_20_Link"><text:span text:style-name="Internet_20_link"><text:span text:style-name="T3">Official Resources</text:span></text:span></text:a><text:span text:style-name="T3"> </text:span></text:p>
            </text:list-item>
            <text:list-item>
              <text:p text:style-name="P4"><text:span text:style-name="T3">10.2 </text:span><text:a xlink:type="simple" xlink:href="#102-community-support" text:style-name="Internet_20_link" text:visited-style-name="Visited_20_Internet_20_Link"><text:span text:style-name="Internet_20_link"><text:span text:style-name="T3">Community Support</text:span></text:span></text:a><text:span text:style-name="T3"> </text:span></text:p>
            </text:list-item>
            <text:list-item>
              <text:p text:style-name="P4"><text:span text:style-name="T3">10.3 </text:span><text:a xlink:type="simple" xlink:href="#103-diagnostic-commands" text:style-name="Internet_20_link" text:visited-style-name="Visited_20_Internet_20_Link"><text:span text:style-name="Internet_20_link"><text:span text:style-name="T3">Diagnostic Commands</text:span></text:span></text:a><text:span text:style-name="T3"> </text:span></text:p>
            </text:list-item>
          </text:list>
        </text:list-item>
        <text:list-item>
          <text:p text:style-name="P5"><text:a xlink:type="simple" xlink:href="#11-conclusion" text:style-name="Internet_20_link" text:visited-style-name="Visited_20_Internet_20_Link"><text:span text:style-name="Internet_20_link"><text:span text:style-name="T3">Conclusion</text:span></text:span></text:a><text:span text:style-name="T3"> </text:span></text:p>
        </text:list-item>
      </text:list>
      <text:p text:style-name="P6" loext:marker-style-name="T3"/>
      <text:h text:style-name="P2" text:outline-level="2"><text:span text:style-name="Strong_20_Emphasis"><text:span text:style-name="T2">1. About StarFive VisionFive 2</text:span></text:span></text:h>
      <text:p text:style-name="Text_20_body" loext:marker-style-name="T5"><text:span text:style-name="T3">StarFive VisionFive 2 is a ground-breaking RISC-V single-board computer (SBC) from Shanghai StarFive Technology Co., Ltd. One of the very first low-cost RISC-V boards capable of running full Linux distributions, it is a landmark achievement in open-source hardware.</text:span><text:span text:style-name="T3"/></text:p>
      <text:p text:style-name="Text_20_body" loext:marker-style-name="T5"><text:span text:style-name="T3">The VisionFive 2 is based on the open RISC-V architecture, giving developers unprecedented liberty and versatility for innovation. Unlike other proprietary architectures, RISC-V offers total transparency and the ability to be customized, making it a perfect learning as well as professional development platform.This board is particularly well-suited for:</text:span><text:span text:style-name="T3"/></text:p>
      <text:list text:style-name="WWNum8">
        <text:list-item>
          <text:p text:style-name="P7" loext:marker-style-name="T5"><text:span text:style-name="T3">Educational purposes and RISC-V architecture learning </text:span><text:span text:style-name="T3"/></text:p>
        </text:list-item>
        <text:list-item>
          <text:p text:style-name="P7" loext:marker-style-name="T5"><text:span text:style-name="T3">IoT and embedded system development </text:span><text:span text:style-name="T3"/></text:p>
        </text:list-item>
        <text:list-item>
          <text:p text:style-name="P7" loext:marker-style-name="T5"><text:span text:style-name="T3">Linux kernel development and testing </text:span><text:span text:style-name="T3"/></text:p>
        </text:list-item>
        <text:list-item>
          <text:p text:style-name="P7" loext:marker-style-name="T5"><text:span text:style-name="T3">Open-source hardware projects </text:span><text:span text:style-name="T3"/></text:p>
        </text:list-item>
        <text:list-item>
          <text:p text:style-name="P8" loext:marker-style-name="T5"><text:span text:style-name="T3">Research and development in emerging computing architectures </text:span><text:span text:style-name="T3"/></text:p>
        </text:list-item>
      </text:list>
      <text:h text:style-name="P2" text:outline-level="2"><text:span text:style-name="Strong_20_Emphasis"><text:span text:style-name="T2">2. System Specifications</text:span></text:span></text:h>
      <text:h text:style-name="P9" text:outline-level="3" loext:marker-style-name="T5"><text:span text:style-name="T3">2.1 Processor</text:span><text:span text:style-name="T3"/></text:h>
      <text:list text:style-name="WWNum9">
        <text:list-item>
          <text:p text:style-name="P10"><text:span text:style-name="Strong_20_Emphasis"><text:span text:style-name="T3">CPU</text:span></text:span><text:span text:style-name="T3">: StarFive JH-7110 quad-core processor </text:span></text:p>
        </text:list-item>
        <text:list-item>
          <text:p text:style-name="P10"><text:span text:style-name="Strong_20_Emphasis"><text:span text:style-name="T3">Architecture</text:span></text:span><text:span text:style-name="T3">: RISC-V 64-bit (RV64GC ISA) </text:span></text:p>
        </text:list-item>
        <text:list-item>
          <text:p text:style-name="P10"><text:span text:style-name="Strong_20_Emphasis"><text:span text:style-name="T3">Clock Speed</text:span></text:span><text:span text:style-name="T3">: Up to 1.5 GHz </text:span></text:p>
        </text:list-item>
        <text:list-item>
          <text:p text:style-name="P11"><text:span text:style-name="Strong_20_Emphasis"><text:span text:style-name="T3">Cache</text:span></text:span><text:span text:style-name="T3">: 2MB L2 cache </text:span></text:p>
        </text:list-item>
      </text:list>
      <text:h text:style-name="P9" text:outline-level="3" loext:marker-style-name="T5"><text:soft-page-break/><text:span text:style-name="T3">2.2 Graphics</text:span><text:span text:style-name="T3"/></text:h>
      <text:list text:style-name="WWNum10">
        <text:list-item>
          <text:p text:style-name="P12"><text:span text:style-name="Strong_20_Emphasis"><text:span text:style-name="T3">GPU</text:span></text:span><text:span text:style-name="T3">: Imagination Technologies IMG BXE-4-32 MC1 </text:span></text:p>
        </text:list-item>
        <text:list-item>
          <text:p text:style-name="P12"><text:span text:style-name="Strong_20_Emphasis"><text:span text:style-name="T3">Video Decoding</text:span></text:span><text:span text:style-name="T3">: Hardware acceleration up to 4K@60fps </text:span></text:p>
        </text:list-item>
        <text:list-item>
          <text:p text:style-name="P13"><text:span text:style-name="Strong_20_Emphasis"><text:span text:style-name="T3">Display Output</text:span></text:span><text:span text:style-name="T3">: HDMI 2.0 support </text:span></text:p>
        </text:list-item>
      </text:list>
      <text:h text:style-name="P9" text:outline-level="3" loext:marker-style-name="T5"><text:span text:style-name="T3">2.3 Memory Options</text:span><text:span text:style-name="T3"/></text:h>
      <text:list text:style-name="WWNum11">
        <text:list-item>
          <text:p text:style-name="P14"><text:span text:style-name="Strong_20_Emphasis"><text:span text:style-name="T3">RAM</text:span></text:span><text:span text:style-name="T3">: LPDDR4 in multiple configurations: </text:span></text:p>
          <text:list>
            <text:list-item>
              <text:p text:style-name="P15" loext:marker-style-name="T5"><text:span text:style-name="T3">2GB variant </text:span><text:span text:style-name="T3"/></text:p>
            </text:list-item>
            <text:list-item>
              <text:p text:style-name="P15" loext:marker-style-name="T5"><text:span text:style-name="T3">4GB variant </text:span><text:span text:style-name="T3"/></text:p>
            </text:list-item>
            <text:list-item>
              <text:p text:style-name="P16" loext:marker-style-name="T5"><text:span text:style-name="T3">8GB variant </text:span><text:span text:style-name="T3"/></text:p>
            </text:list-item>
          </text:list>
        </text:list-item>
      </text:list>
      <text:h text:style-name="P9" text:outline-level="3" loext:marker-style-name="T5"><text:span text:style-name="T3">2.4 Connectivity &amp; I/O</text:span><text:span text:style-name="T3"/></text:h>
      <text:list text:style-name="WWNum12">
        <text:list-item>
          <text:p text:style-name="P17"><text:span text:style-name="Strong_20_Emphasis"><text:span text:style-name="T3">USB</text:span></text:span><text:span text:style-name="T3">: Multiple USB 3.0 ports </text:span></text:p>
        </text:list-item>
        <text:list-item>
          <text:p text:style-name="P17"><text:span text:style-name="Strong_20_Emphasis"><text:span text:style-name="T3">Networking</text:span></text:span><text:span text:style-name="T3">: Gigabit Ethernet </text:span></text:p>
        </text:list-item>
        <text:list-item>
          <text:p text:style-name="P17"><text:span text:style-name="Strong_20_Emphasis"><text:span text:style-name="T3">Camera</text:span></text:span><text:span text:style-name="T3">: MIPI CSI interface </text:span></text:p>
        </text:list-item>
        <text:list-item>
          <text:p text:style-name="P17"><text:span text:style-name="Strong_20_Emphasis"><text:span text:style-name="T3">Display</text:span></text:span><text:span text:style-name="T3">: MIPI DSI interface </text:span></text:p>
        </text:list-item>
        <text:list-item>
          <text:p text:style-name="P17"><text:span text:style-name="Strong_20_Emphasis"><text:span text:style-name="T3">GPIO</text:span></text:span><text:span text:style-name="T3">: Standard GPIO header for expansion </text:span></text:p>
        </text:list-item>
        <text:list-item>
          <text:p text:style-name="P18"><text:span text:style-name="Strong_20_Emphasis"><text:span text:style-name="T3">Audio</text:span></text:span><text:span text:style-name="T3">: 3.5mm audio jack </text:span></text:p>
        </text:list-item>
      </text:list>
      <text:h text:style-name="P9" text:outline-level="3" loext:marker-style-name="T5"><text:span text:style-name="T3">2.5 Storage Options</text:span><text:span text:style-name="T3"/></text:h>
      <text:list text:style-name="WWNum13">
        <text:list-item>
          <text:p text:style-name="P19"><text:span text:style-name="Strong_20_Emphasis"><text:span text:style-name="T3">SD Card</text:span></text:span><text:span text:style-name="T3">: MicroSD card slot (primary boot option) </text:span></text:p>
        </text:list-item>
        <text:list-item>
          <text:p text:style-name="P19"><text:span text:style-name="Strong_20_Emphasis"><text:span text:style-name="T3">eMMC</text:span></text:span><text:span text:style-name="T3">: Onboard eMMC socket </text:span></text:p>
        </text:list-item>
        <text:list-item>
          <text:p text:style-name="P20"><text:span text:style-name="Strong_20_Emphasis"><text:span text:style-name="T3">NVMe</text:span></text:span><text:span text:style-name="T3">: M.2 NVMe SSD support (depending on variant) </text:span></text:p>
        </text:list-item>
      </text:list>
      <text:h text:style-name="P9" text:outline-level="3" loext:marker-style-name="T5"><text:span text:style-name="T3">2.6 Power</text:span><text:span text:style-name="T3"/></text:h>
      <text:list text:style-name="WWNum14">
        <text:list-item>
          <text:p text:style-name="P21"><text:span text:style-name="Strong_20_Emphasis"><text:span text:style-name="T3">Power Input</text:span></text:span><text:span text:style-name="T3">: USB-C power delivery </text:span></text:p>
        </text:list-item>
        <text:list-item>
          <text:p text:style-name="P22"><text:span text:style-name="Strong_20_Emphasis"><text:span text:style-name="T3">Power Consumption</text:span></text:span><text:span text:style-name="T3">: Low power design suitable for continuous operation </text:span></text:p>
        </text:list-item>
      </text:list>
      <text:p text:style-name="P23" loext:marker-style-name="T3"/>
      <text:h text:style-name="P2" text:outline-level="2"><text:span text:style-name="Strong_20_Emphasis"><text:span text:style-name="T2">3. Supported Operating Systems</text:span></text:span></text:h>
      <text:p text:style-name="Text_20_body" loext:marker-style-name="T5"><text:span text:style-name="T3">The StarFive VisionFive 2 supports a wide range of Linux distributions, making it one of the most versatile RISC-V platforms available:</text:span><text:span text:style-name="T3"/></text:p>
      <text:h text:style-name="P9" text:outline-level="3" loext:marker-style-name="T5"><text:soft-page-break/><text:span text:style-name="T3">3.1 Officially Supported Distributions</text:span><text:span text:style-name="T3"/></text:h>
      <text:list text:style-name="WWNum15">
        <text:list-item>
          <text:p text:style-name="P24" loext:marker-style-name="T5"><text:span text:style-name="T3">Debian (Primary official support) </text:span><text:span text:style-name="T3"/></text:p>
        </text:list-item>
        <text:list-item>
          <text:p text:style-name="P24" loext:marker-style-name="T5"><text:span text:style-name="T3">Ubuntu Server (23.04, 24.04 LTS, 25.04) </text:span><text:span text:style-name="T3"/></text:p>
        </text:list-item>
        <text:list-item>
          <text:p text:style-name="P25" loext:marker-style-name="T5"><text:span text:style-name="T3">Ubuntu Desktop (Limited support) </text:span><text:span text:style-name="T3"/></text:p>
        </text:list-item>
      </text:list>
      <text:h text:style-name="P9" text:outline-level="3" loext:marker-style-name="T5"><text:span text:style-name="T3">3.2 Community Supported Distributions</text:span><text:span text:style-name="T3"/></text:h>
      <text:list text:style-name="WWNum16">
        <text:list-item>
          <text:p text:style-name="P26" loext:marker-style-name="T5"><text:span text:style-name="T3">Arch Linux </text:span><text:span text:style-name="T3"/></text:p>
        </text:list-item>
        <text:list-item>
          <text:p text:style-name="P26" loext:marker-style-name="T5"><text:span text:style-name="T3">Deepin Linux </text:span><text:span text:style-name="T3"/></text:p>
        </text:list-item>
        <text:list-item>
          <text:p text:style-name="P26" loext:marker-style-name="T5"><text:span text:style-name="T3">Gentoo Linux </text:span><text:span text:style-name="T3"/></text:p>
        </text:list-item>
        <text:list-item>
          <text:p text:style-name="P26" loext:marker-style-name="T5"><text:span text:style-name="T3">OpenWrt </text:span><text:span text:style-name="T3"/></text:p>
        </text:list-item>
        <text:list-item>
          <text:p text:style-name="P26" loext:marker-style-name="T5"><text:span text:style-name="T3">Chromium OS </text:span><text:span text:style-name="T3"/></text:p>
        </text:list-item>
        <text:list-item>
          <text:p text:style-name="P26" loext:marker-style-name="T5"><text:span text:style-name="T3">Lubuntu </text:span><text:span text:style-name="T3"/></text:p>
        </text:list-item>
        <text:list-item>
          <text:p text:style-name="P26" loext:marker-style-name="T5"><text:span text:style-name="T3">OpenEuler </text:span><text:span text:style-name="T3"/></text:p>
        </text:list-item>
        <text:list-item>
          <text:p text:style-name="P27" loext:marker-style-name="T5"><text:span text:style-name="T3">OpenHarmony </text:span><text:span text:style-name="T3"/></text:p>
        </text:list-item>
      </text:list>
      <text:h text:style-name="P9" text:outline-level="3" loext:marker-style-name="T5"><text:span text:style-name="T3">3.3 Experimental/Development Distributions</text:span><text:span text:style-name="T3"/></text:h>
      <text:list text:style-name="WWNum17">
        <text:list-item>
          <text:p text:style-name="P28" loext:marker-style-name="T5"><text:span text:style-name="T3">Fedora (Community builds) </text:span><text:span text:style-name="T3"/></text:p>
        </text:list-item>
        <text:list-item>
          <text:p text:style-name="P28" loext:marker-style-name="T5"><text:span text:style-name="T3">openSUSE (Community builds) </text:span><text:span text:style-name="T3"/></text:p>
        </text:list-item>
        <text:list-item>
          <text:p text:style-name="P29" loext:marker-style-name="T5"><text:span text:style-name="T3">Alpine Linux (Community builds) </text:span><text:span text:style-name="T3"/></text:p>
        </text:list-item>
      </text:list>
      <text:h text:style-name="P2" text:outline-level="2"><text:span text:style-name="Strong_20_Emphasis"><text:span text:style-name="T2">4. Recommended Operating System</text:span></text:span></text:h>
      <text:h text:style-name="P9" text:outline-level="3" loext:marker-style-name="T5"><text:span text:style-name="T3">4.1 For Beginners: Ubuntu 24.04 LTS Server</text:span><text:span text:style-name="T3"/></text:h>
      <text:p text:style-name="Text_20_body"><text:span text:style-name="Strong_20_Emphasis"><text:span text:style-name="T3">Why Ubuntu 24.04 LTS?</text:span></text:span></text:p>
      <text:list text:style-name="WWNum18">
        <text:list-item>
          <text:p text:style-name="P30"><text:span text:style-name="Strong_20_Emphasis"><text:span text:style-name="T3">Long Term Support</text:span></text:span><text:span text:style-name="T3">: 5 years of security updates and support </text:span></text:p>
        </text:list-item>
        <text:list-item>
          <text:p text:style-name="P30"><text:span text:style-name="Strong_20_Emphasis"><text:span text:style-name="T3">Stability</text:span></text:span><text:span text:style-name="T3">: Well-tested and stable release </text:span></text:p>
        </text:list-item>
        <text:list-item>
          <text:p text:style-name="P30"><text:span text:style-name="Strong_20_Emphasis"><text:span text:style-name="T3">Hardware Support</text:span></text:span><text:span text:style-name="T3">: Excellent RISC-V hardware compatibility </text:span></text:p>
        </text:list-item>
        <text:list-item>
          <text:p text:style-name="P30"><text:span text:style-name="Strong_20_Emphasis"><text:span text:style-name="T3">Community</text:span></text:span><text:span text:style-name="T3">: Large community and extensive documentation </text:span></text:p>
        </text:list-item>
        <text:list-item>
          <text:p text:style-name="P30"><text:span text:style-name="Strong_20_Emphasis"><text:span text:style-name="T3">Package Availability</text:span></text:span><text:span text:style-name="T3">: Comprehensive software repository </text:span></text:p>
        </text:list-item>
        <text:list-item>
          <text:p text:style-name="P31"><text:span text:style-name="Strong_20_Emphasis"><text:span text:style-name="T3">User-Friendly</text:span></text:span><text:span text:style-name="T3">: Easier learning curve for Linux newcomers </text:span></text:p>
        </text:list-item>
      </text:list>
      <text:h text:style-name="P9" text:outline-level="3" loext:marker-style-name="T5"><text:span text:style-name="T3">4.2 For Advanced Users: Debian</text:span><text:span text:style-name="T3"/></text:h>
      <text:p text:style-name="Text_20_body"><text:span text:style-name="Strong_20_Emphasis"><text:span text:style-name="T3">Why Debian is the Top Choice:</text:span></text:span></text:p>
      <text:list text:style-name="WWNum19">
        <text:list-item>
          <text:p text:style-name="P32"><text:soft-page-break/><text:span text:style-name="Strong_20_Emphasis"><text:span text:style-name="T3">Official Support</text:span></text:span><text:span text:style-name="T3">: Primary OS officially supported and maintained by StarFive </text:span></text:p>
        </text:list-item>
        <text:list-item>
          <text:p text:style-name="P32"><text:span text:style-name="Strong_20_Emphasis"><text:span text:style-name="T3">Maximum Stability</text:span></text:span><text:span text:style-name="T3">: Debian's rigorous testing ensures rock-solid stability for production environments </text:span></text:p>
        </text:list-item>
        <text:list-item>
          <text:p text:style-name="P32"><text:span text:style-name="Strong_20_Emphasis"><text:span text:style-name="T3">Superior Performance</text:span></text:span><text:span text:style-name="T3">: Optimized specifically for RISC-V architecture with minimal resource overhead </text:span></text:p>
        </text:list-item>
        <text:list-item>
          <text:p text:style-name="P32"><text:span text:style-name="Strong_20_Emphasis"><text:span text:style-name="T3">Complete Hardware Integration</text:span></text:span><text:span text:style-name="T3">: Best driver support and hardware compatibility with VisionFive 2 </text:span></text:p>
        </text:list-item>
        <text:list-item>
          <text:p text:style-name="P32"><text:span text:style-name="Strong_20_Emphasis"><text:span text:style-name="T3">Granular Control</text:span></text:span><text:span text:style-name="T3">: Advanced package management and system configuration options </text:span></text:p>
        </text:list-item>
        <text:list-item>
          <text:p text:style-name="P32"><text:span text:style-name="Strong_20_Emphasis"><text:span text:style-name="T3">Security Focus</text:span></text:span><text:span text:style-name="T3">: Debian's security team provides rapid patches and updates </text:span></text:p>
        </text:list-item>
        <text:list-item>
          <text:p text:style-name="P32"><text:span text:style-name="Strong_20_Emphasis"><text:span text:style-name="T3">Lightweight Design</text:span></text:span><text:span text:style-name="T3">: Minimal resource usage, perfect for embedded applications </text:span></text:p>
        </text:list-item>
        <text:list-item>
          <text:p text:style-name="P32"><text:span text:style-name="Strong_20_Emphasis"><text:span text:style-name="T3">Long-term Reliability</text:span></text:span><text:span text:style-name="T3">: Proven track record in server and embedded environments </text:span></text:p>
        </text:list-item>
        <text:list-item>
          <text:p text:style-name="P32"><text:span text:style-name="Strong_20_Emphasis"><text:span text:style-name="T3">Professional Support</text:span></text:span><text:span text:style-name="T3">: Direct support from StarFive development team </text:span></text:p>
        </text:list-item>
        <text:list-item>
          <text:p text:style-name="P32"><text:span text:style-name="Strong_20_Emphasis"><text:span text:style-name="T3">Optimized Kernel</text:span></text:span><text:span text:style-name="T3">: Custom kernel optimizations for JH-7110 processor </text:span></text:p>
        </text:list-item>
        <text:list-item>
          <text:p text:style-name="P32"><text:span text:style-name="Strong_20_Emphasis"><text:span text:style-name="T3">Enterprise Ready</text:span></text:span><text:span text:style-name="T3">: Suitable for commercial and production deployments </text:span></text:p>
        </text:list-item>
        <text:list-item>
          <text:p text:style-name="P33"><text:span text:style-name="Strong_20_Emphasis"><text:span text:style-name="T3">No Bloatware</text:span></text:span><text:span text:style-name="T3">: Clean, minimal installation with only essential components </text:span></text:p>
        </text:list-item>
      </text:list>
      <text:h text:style-name="P9" text:outline-level="3" loext:marker-style-name="T5"><text:span text:style-name="T3">4.3 For Development: Ubuntu Server 25.04</text:span><text:span text:style-name="T3"/></text:h>
      <text:p text:style-name="Text_20_body"><text:span text:style-name="Strong_20_Emphasis"><text:span text:style-name="T3">Why Ubuntu 25.04?</text:span></text:span></text:p>
      <text:list text:style-name="WWNum20">
        <text:list-item>
          <text:p text:style-name="P34"><text:span text:style-name="Strong_20_Emphasis"><text:span text:style-name="T3">Latest Features</text:span></text:span><text:span text:style-name="T3">: Cutting-edge kernel and software versions </text:span></text:p>
        </text:list-item>
        <text:list-item>
          <text:p text:style-name="P34"><text:span text:style-name="Strong_20_Emphasis"><text:span text:style-name="T3">Development Tools</text:span></text:span><text:span text:style-name="T3">: Latest development frameworks and tools </text:span></text:p>
        </text:list-item>
        <text:list-item>
          <text:p text:style-name="P35"><text:span text:style-name="Strong_20_Emphasis"><text:span text:style-name="T3">Experimental Features</text:span></text:span><text:span text:style-name="T3">: Access to newest RISC-V developments </text:span></text:p>
        </text:list-item>
      </text:list>
      <text:h text:style-name="P2" text:outline-level="2"><text:span text:style-name="Strong_20_Emphasis"><text:span text:style-name="T2">5. Installation Process</text:span></text:span></text:h>
      <text:h text:style-name="P9" text:outline-level="3" loext:marker-style-name="T5"><text:span text:style-name="T3">5.1 Prerequisites</text:span><text:span text:style-name="T3"/></text:h>
      <text:list text:style-name="WWNum21">
        <text:list-item>
          <text:p text:style-name="P36" loext:marker-style-name="T5"><text:span text:style-name="T3">StarFive VisionFive 2 board </text:span><text:span text:style-name="T3"/></text:p>
        </text:list-item>
        <text:list-item>
          <text:p text:style-name="P36" loext:marker-style-name="T5"><text:span text:style-name="T3">MicroSD card (minimum 16GB, Class 10 or better recommended) </text:span><text:span text:style-name="T3"/></text:p>
        </text:list-item>
        <text:list-item>
          <text:p text:style-name="P36" loext:marker-style-name="T5"><text:span text:style-name="T3">USB-C power adapter (5V/3A minimum) </text:span><text:span text:style-name="T3"/></text:p>
        </text:list-item>
        <text:list-item>
          <text:p text:style-name="P36" loext:marker-style-name="T5"><text:span text:style-name="T3">HDMI cable and monitor </text:span><text:span text:style-name="T3"/></text:p>
        </text:list-item>
        <text:list-item>
          <text:p text:style-name="P36" loext:marker-style-name="T5"><text:span text:style-name="T3">Keyboard and mouse </text:span><text:span text:style-name="T3"/></text:p>
        </text:list-item>
        <text:list-item>
          <text:p text:style-name="P36" loext:marker-style-name="T5"><text:span text:style-name="T3">macOS computer for flashing </text:span><text:span text:style-name="T3"/></text:p>
        </text:list-item>
        <text:list-item>
          <text:p text:style-name="P37" loext:marker-style-name="T5"><text:span text:style-name="T3">Internet connection for downloads </text:span><text:span text:style-name="T3"/></text:p>
        </text:list-item>
      </text:list>
      <text:h text:style-name="P9" text:outline-level="3" loext:marker-style-name="T5"><text:soft-page-break/><text:span text:style-name="T3">5.2 Step 1: Download the Operating System Image</text:span><text:span text:style-name="T3"/></text:h>
      <text:p text:style-name="Text_20_body"><text:span text:style-name="Strong_20_Emphasis"><text:span text:style-name="T3">For Ubuntu 24.04 LTS:</text:span></text:span></text:p>
      <text:list text:style-name="WWNum22">
        <text:list-item>
          <text:p text:style-name="P38" loext:marker-style-name="T5"><text:span text:style-name="T3">Visit the official Ubuntu download page for RISC-V </text:span><text:span text:style-name="T3"/></text:p>
        </text:list-item>
        <text:list-item>
          <text:p text:style-name="P38" loext:marker-style-name="T5"><text:span text:style-name="T3">Download the Ubuntu 24.04 LTS Server image for StarFive VisionFive 2 </text:span><text:span text:style-name="T3"/></text:p>
        </text:list-item>
        <text:list-item>
          <text:p text:style-name="P39" loext:marker-style-name="T5"><text:span text:style-name="T3">File format: .img.xz or .img.bz2 </text:span><text:span text:style-name="T3"/></text:p>
        </text:list-item>
      </text:list>
      <text:p text:style-name="Text_20_body"><text:span text:style-name="Strong_20_Emphasis"><text:span text:style-name="T3">For Debian:</text:span></text:span></text:p>
      <text:list text:style-name="WWNum23">
        <text:list-item>
          <text:p text:style-name="P40" loext:marker-style-name="T5"><text:span text:style-name="T3">Visit StarFive's official website: https://www.starfivetech.com </text:span><text:span text:style-name="T3"/></text:p>
        </text:list-item>
        <text:list-item>
          <text:p text:style-name="P40" loext:marker-style-name="T5"><text:span text:style-name="T3">Navigate to the VisionFive 2 support section </text:span><text:span text:style-name="T3"/></text:p>
        </text:list-item>
        <text:list-item>
          <text:p text:style-name="P40" loext:marker-style-name="T5"><text:span text:style-name="T3">Download the latest Debian image </text:span><text:span text:style-name="T3"/></text:p>
        </text:list-item>
        <text:list-item>
          <text:p text:style-name="P41" loext:marker-style-name="T5"><text:span text:style-name="T3">File format: .img.bz2 </text:span><text:span text:style-name="T3"/></text:p>
        </text:list-item>
      </text:list>
      <text:h text:style-name="P9" text:outline-level="3" loext:marker-style-name="T5"><text:span text:style-name="T3">5.3 Step 2: Verify Download Integrity</text:span><text:span text:style-name="T3"/></text:h>
      <text:p text:style-name="Text_20_body" loext:marker-style-name="T5"><text:span text:style-name="T3">Always verify the downloaded image using checksums:</text:span><text:span text:style-name="T3"/></text:p>
      <text:p text:style-name="Preformatted_20_Text"><text:span text:style-name="Source_20_Text"><text:span text:style-name="T3"># For Ubuntu images</text:span></text:span></text:p>
      <text:p text:style-name="Preformatted_20_Text"><text:span text:style-name="Source_20_Text"><text:span text:style-name="T3">sha256sum ubuntu-24.04-preinstalled-server-riscv64+visionfive2.img.xz</text:span></text:span></text:p>
      <text:p text:style-name="P42" loext:marker-style-name="T3"/>
      <text:p text:style-name="Preformatted_20_Text"><text:span text:style-name="Source_20_Text"><text:span text:style-name="T3"># For Debian images</text:span></text:span></text:p>
      <text:p text:style-name="P43"><text:span text:style-name="Source_20_Text"><text:span text:style-name="T3">sha256sum starfive-jh7110-VF2-&lt;version&gt;.img.bz2</text:span></text:span></text:p>
      <text:h text:style-name="P9" text:outline-level="3" loext:marker-style-name="T5"><text:span text:style-name="T3">5.4 Step 3: Extract the Image</text:span><text:span text:style-name="T3"/></text:h>
      <text:p text:style-name="Text_20_body" loext:marker-style-name="T5"><text:span text:style-name="T3">Extract the compressed image file:</text:span><text:span text:style-name="T3"/></text:p>
      <text:p text:style-name="Preformatted_20_Text"><text:span text:style-name="Source_20_Text"><text:span text:style-name="T3"># For .bz2 files</text:span></text:span></text:p>
      <text:p text:style-name="Preformatted_20_Text"><text:span text:style-name="Source_20_Text"><text:span text:style-name="T3">bzip2 -dk starfive-jh7110-VF2-&lt;version&gt;.img.bz2</text:span></text:span></text:p>
      <text:p text:style-name="P42" loext:marker-style-name="T3"/>
      <text:p text:style-name="Preformatted_20_Text"><text:span text:style-name="Source_20_Text"><text:span text:style-name="T3"># For .xz files</text:span></text:span></text:p>
      <text:p text:style-name="P43"><text:span text:style-name="Source_20_Text"><text:span text:style-name="T3">xz -dk ubuntu-24.04-preinstalled-server-riscv64+visionfive2.img.xz</text:span></text:span></text:p>
      <text:h text:style-name="P2" text:outline-level="2"><text:span text:style-name="Strong_20_Emphasis"><text:span text:style-name="T2">6. Creating Bootable SD Card on macOS</text:span></text:span></text:h>
      <text:h text:style-name="P9" text:outline-level="3" loext:marker-style-name="T5"><text:span text:style-name="T3">6.1 Method 1: Using BalenaEtcher (Recommended for Beginners)</text:span><text:span text:style-name="T3"/></text:h>
      <text:p text:style-name="Text_20_body"><text:span text:style-name="Strong_20_Emphasis"><text:span text:style-name="T3">Step 1: Install BalenaEtcher</text:span></text:span></text:p>
      <text:list text:style-name="WWNum24">
        <text:list-item>
          <text:p text:style-name="P44" loext:marker-style-name="T5"><text:span text:style-name="T3">Download BalenaEtcher from https://www.balena.io/etcher/ </text:span><text:span text:style-name="T3"/></text:p>
        </text:list-item>
        <text:list-item>
          <text:p text:style-name="P44" loext:marker-style-name="T5"><text:span text:style-name="T3">Install the application following the standard macOS installation process </text:span><text:span text:style-name="T3"/></text:p>
        </text:list-item>
        <text:list-item>
          <text:p text:style-name="P45" loext:marker-style-name="T5"><text:span text:style-name="T3">Launch BalenaEtcher </text:span><text:span text:style-name="T3"/></text:p>
        </text:list-item>
      </text:list>
      <text:p text:style-name="Text_20_body"><text:soft-page-break/><text:span text:style-name="Strong_20_Emphasis"><text:span text:style-name="T3">Step 2: Flash the Image</text:span></text:span></text:p>
      <text:list text:style-name="WWNum25">
        <text:list-item>
          <text:p text:style-name="P46"><text:span text:style-name="Strong_20_Emphasis"><text:span text:style-name="T3">Select Image</text:span></text:span><text:span text:style-name="T3">: Click "Flash from file" and select your extracted .img file </text:span></text:p>
        </text:list-item>
        <text:list-item>
          <text:p text:style-name="P46"><text:span text:style-name="Strong_20_Emphasis"><text:span text:style-name="T3">Select Target</text:span></text:span><text:span text:style-name="T3">: Insert your MicroSD card and select it as the target </text:span></text:p>
        </text:list-item>
        <text:list-item>
          <text:p text:style-name="P46"><text:span text:style-name="Strong_20_Emphasis"><text:span text:style-name="T3">Flash</text:span></text:span><text:span text:style-name="T3">: Click "Flash!" to begin the process </text:span></text:p>
        </text:list-item>
        <text:list-item>
          <text:p text:style-name="P47"><text:span text:style-name="Strong_20_Emphasis"><text:span text:style-name="T3">Validation</text:span></text:span><text:span text:style-name="T3">: BalenaEtcher will automatically validate the flash </text:span></text:p>
        </text:list-item>
      </text:list>
      <text:p text:style-name="Text_20_body"><text:span text:style-name="Strong_20_Emphasis"><text:span text:style-name="T3">Step 3: Safely Eject</text:span></text:span></text:p>
      <text:list text:style-name="WWNum26">
        <text:list-item>
          <text:p text:style-name="P48" loext:marker-style-name="T5"><text:span text:style-name="T3">Wait for the "Flash Complete!" message </text:span><text:span text:style-name="T3"/></text:p>
        </text:list-item>
        <text:list-item>
          <text:p text:style-name="P49" loext:marker-style-name="T5"><text:span text:style-name="T3">Safely eject the MicroSD card from your Mac </text:span><text:span text:style-name="T3"/></text:p>
        </text:list-item>
      </text:list>
      <text:h text:style-name="P9" text:outline-level="3" loext:marker-style-name="T5"><text:span text:style-name="T3">6.2 Method 2: Using Command Line (Advanced Users)</text:span><text:span text:style-name="T3"/></text:h>
      <text:p text:style-name="Text_20_body"><text:span text:style-name="Strong_20_Emphasis"><text:span text:style-name="T3">Step 1: Identify the SD Card</text:span></text:span></text:p>
      <text:p text:style-name="Preformatted_20_Text"><text:span text:style-name="Source_20_Text"><text:span text:style-name="T3"># List all storage devices</text:span></text:span></text:p>
      <text:p text:style-name="Preformatted_20_Text"><text:span text:style-name="Source_20_Text"><text:span text:style-name="T3">diskutil list</text:span></text:span></text:p>
      <text:p text:style-name="P42" loext:marker-style-name="T3"/>
      <text:p text:style-name="Preformatted_20_Text"><text:span text:style-name="Source_20_Text"><text:span text:style-name="T3"># Find your SD card (usually /dev/disk2 or /dev/disk3)</text:span></text:span></text:p>
      <text:p text:style-name="P43"><text:span text:style-name="Source_20_Text"><text:span text:style-name="T3"># Note: Be very careful to select the correct disk!</text:span></text:span></text:p>
      <text:p text:style-name="Text_20_body"><text:span text:style-name="Strong_20_Emphasis"><text:span text:style-name="T3">Step 2: Unmount the SD Card</text:span></text:span></text:p>
      <text:p text:style-name="Preformatted_20_Text"><text:span text:style-name="Source_20_Text"><text:span text:style-name="T3"># Replace X with your disk number</text:span></text:span></text:p>
      <text:p text:style-name="P43"><text:span text:style-name="Source_20_Text"><text:span text:style-name="T3">diskutil unmountDisk /dev/diskX</text:span></text:span></text:p>
      <text:p text:style-name="Text_20_body"><text:span text:style-name="Strong_20_Emphasis"><text:span text:style-name="T3">Step 3: Flash the Image</text:span></text:span></text:p>
      <text:p text:style-name="Preformatted_20_Text"><text:span text:style-name="Source_20_Text"><text:span text:style-name="T3"># Replace X with your disk number and adjust the path to your image</text:span></text:span></text:p>
      <text:p text:style-name="Preformatted_20_Text"><text:span text:style-name="Source_20_Text"><text:span text:style-name="T3">sudo dd if=path/to/your/image.img of=/dev/rdiskX bs=1m</text:span></text:span></text:p>
      <text:p text:style-name="P42" loext:marker-style-name="T3"/>
      <text:p text:style-name="Preformatted_20_Text"><text:span text:style-name="Source_20_Text"><text:span text:style-name="T3"># Monitor progress (in another terminal)</text:span></text:span></text:p>
      <text:p text:style-name="P43"><text:span text:style-name="Source_20_Text"><text:span text:style-name="T3">sudo pkill -USR1 dd</text:span></text:span></text:p>
      <text:p text:style-name="Text_20_body"><text:span text:style-name="Strong_20_Emphasis"><text:span text:style-name="T3">Step 4: Sync and Eject</text:span></text:span></text:p>
      <text:p text:style-name="Preformatted_20_Text"><text:span text:style-name="Source_20_Text"><text:span text:style-name="T3"># Ensure all data is written</text:span></text:span></text:p>
      <text:p text:style-name="Preformatted_20_Text"><text:span text:style-name="Source_20_Text"><text:span text:style-name="T3">sync</text:span></text:span></text:p>
      <text:p text:style-name="P42" loext:marker-style-name="T3"/>
      <text:p text:style-name="Preformatted_20_Text"><text:span text:style-name="Source_20_Text"><text:span text:style-name="T3"># Eject the card</text:span></text:span></text:p>
      <text:p text:style-name="P43"><text:span text:style-name="Source_20_Text"><text:span text:style-name="T3">diskutil eject /dev/diskX</text:span></text:span></text:p>
      <text:h text:style-name="P2" text:outline-level="2"><text:soft-page-break/><text:span text:style-name="Strong_20_Emphasis"><text:span text:style-name="T2">7. Boot Configuration and First Login</text:span></text:span></text:h>
      <text:h text:style-name="P9" text:outline-level="3" loext:marker-style-name="T5"><text:span text:style-name="T3">7.1 Step 1: Configure Boot Mode</text:span><text:span text:style-name="T3"/></text:h>
      <text:list text:style-name="WWNum27">
        <text:list-item>
          <text:p text:style-name="P50"><text:span text:style-name="Strong_20_Emphasis"><text:span text:style-name="T3">Locate Boot Pins</text:span></text:span><text:span text:style-name="T3">: Find the boot mode pins on your VisionFive 2 board </text:span></text:p>
        </text:list-item>
        <text:list-item>
          <text:p text:style-name="P50"><text:span text:style-name="Strong_20_Emphasis"><text:span text:style-name="T3">Set SD Card Boot</text:span></text:span><text:span text:style-name="T3">: Configure the pins for SD card boot mode: </text:span></text:p>
          <text:list>
            <text:list-item>
              <text:p text:style-name="P51" loext:marker-style-name="T5"><text:span text:style-name="T3">Pin 1-2: ON (SD card boot) </text:span><text:span text:style-name="T3"/></text:p>
            </text:list-item>
            <text:list-item>
              <text:p text:style-name="P51" loext:marker-style-name="T5"><text:span text:style-name="T3">Pin 3-4: OFF </text:span><text:span text:style-name="T3"/></text:p>
            </text:list-item>
          </text:list>
        </text:list-item>
        <text:list-item>
          <text:p text:style-name="P52"><text:span text:style-name="Strong_20_Emphasis"><text:span text:style-name="T3">Verify Configuration</text:span></text:span><text:span text:style-name="T3">: Double-check the pin positions </text:span></text:p>
        </text:list-item>
      </text:list>
      <text:h text:style-name="P9" text:outline-level="3" loext:marker-style-name="T5"><text:span text:style-name="T3">7.2 Step 2: Hardware Setup</text:span><text:span text:style-name="T3"/></text:h>
      <text:list text:style-name="WWNum28">
        <text:list-item>
          <text:p text:style-name="P53"><text:span text:style-name="Strong_20_Emphasis"><text:span text:style-name="T3">Insert SD Card</text:span></text:span><text:span text:style-name="T3">: Place the flashed MicroSD card into the board </text:span></text:p>
        </text:list-item>
        <text:list-item>
          <text:p text:style-name="P53"><text:span text:style-name="Strong_20_Emphasis"><text:span text:style-name="T3">Connect Display</text:span></text:span><text:span text:style-name="T3">: Connect HDMI cable to monitor </text:span></text:p>
        </text:list-item>
        <text:list-item>
          <text:p text:style-name="P53"><text:span text:style-name="Strong_20_Emphasis"><text:span text:style-name="T3">Connect Input</text:span></text:span><text:span text:style-name="T3">: Connect USB keyboard and mouse </text:span></text:p>
        </text:list-item>
        <text:list-item>
          <text:p text:style-name="P53"><text:span text:style-name="Strong_20_Emphasis"><text:span text:style-name="T3">Network</text:span></text:span><text:span text:style-name="T3">: Connect Ethernet cable (optional but recommended) </text:span></text:p>
        </text:list-item>
        <text:list-item>
          <text:p text:style-name="P54"><text:span text:style-name="Strong_20_Emphasis"><text:span text:style-name="T3">Power</text:span></text:span><text:span text:style-name="T3">: Connect USB-C power adapter </text:span></text:p>
        </text:list-item>
      </text:list>
      <text:h text:style-name="P9" text:outline-level="3" loext:marker-style-name="T5"><text:span text:style-name="T3">7.3 Step 3: First Boot</text:span><text:span text:style-name="T3"/></text:h>
      <text:list text:style-name="WWNum29">
        <text:list-item>
          <text:p text:style-name="P55"><text:span text:style-name="Strong_20_Emphasis"><text:span text:style-name="T3">Power On</text:span></text:span><text:span text:style-name="T3">: Connect power to start the boot process </text:span></text:p>
        </text:list-item>
        <text:list-item>
          <text:p text:style-name="P55"><text:span text:style-name="Strong_20_Emphasis"><text:span text:style-name="T3">Wait for Boot</text:span></text:span><text:span text:style-name="T3">: Initial boot may take 2-5 minutes </text:span></text:p>
        </text:list-item>
        <text:list-item>
          <text:p text:style-name="P56"><text:span text:style-name="Strong_20_Emphasis"><text:span text:style-name="T3">Watch for Output</text:span></text:span><text:span text:style-name="T3">: Monitor the boot process on your display </text:span></text:p>
        </text:list-item>
      </text:list>
      <text:h text:style-name="P9" text:outline-level="3" loext:marker-style-name="T5"><text:span text:style-name="T3">7.4 Step 4: Login Credentials</text:span><text:span text:style-name="T3"/></text:h>
      <text:p text:style-name="Text_20_body"><text:span text:style-name="Strong_20_Emphasis"><text:span text:style-name="T3">For Debian:</text:span></text:span></text:p>
      <text:list text:style-name="WWNum30">
        <text:list-item>
          <text:p text:style-name="P57" loext:marker-style-name="T5"><text:span text:style-name="T3">Username: user </text:span><text:span text:style-name="T3"/></text:p>
        </text:list-item>
        <text:list-item>
          <text:p text:style-name="P58" loext:marker-style-name="T5"><text:span text:style-name="T3">Password: starfive </text:span><text:span text:style-name="T3"/></text:p>
        </text:list-item>
      </text:list>
      <text:h text:style-name="P9" text:outline-level="3" loext:marker-style-name="T5"><text:span text:style-name="T3">7.5 Step 5: Initial Setup</text:span><text:span text:style-name="T3"/></text:h>
      <text:list text:style-name="WWNum31">
        <text:list-item>
          <text:p text:style-name="P59"><text:span text:style-name="Strong_20_Emphasis"><text:span text:style-name="T3">Change Password</text:span></text:span><text:span text:style-name="T3">: You'll be prompted to change the default password </text:span></text:p>
        </text:list-item>
        <text:list-item>
          <text:p text:style-name="P59"><text:span text:style-name="Strong_20_Emphasis"><text:span text:style-name="T3">Update System</text:span></text:span><text:span text:style-name="T3">: Run system updates </text:span></text:p>
        </text:list-item>
        <text:list-item>
          <text:p text:style-name="P60"><text:span text:style-name="Strong_20_Emphasis"><text:span text:style-name="T3">Configure Network</text:span></text:span><text:span text:style-name="T3">: Set up WiFi or verify Ethernet connection </text:span></text:p>
        </text:list-item>
      </text:list>
      <text:h text:style-name="P2" text:outline-level="2"><text:soft-page-break/><text:span text:style-name="Strong_20_Emphasis"><text:span text:style-name="T2">8. Post-Installation Setup</text:span></text:span></text:h>
      <text:h text:style-name="P9" text:outline-level="3" loext:marker-style-name="T5"><text:span text:style-name="T3">8.1 System Updates</text:span><text:span text:style-name="T3"/></text:h>
      <text:p text:style-name="Preformatted_20_Text"><text:span text:style-name="Source_20_Text"><text:span text:style-name="T3"># Update package lists</text:span></text:span></text:p>
      <text:p text:style-name="Preformatted_20_Text"><text:span text:style-name="Source_20_Text"><text:span text:style-name="T3">sudo apt update</text:span></text:span></text:p>
      <text:p text:style-name="P42" loext:marker-style-name="T3"/>
      <text:p text:style-name="Preformatted_20_Text"><text:span text:style-name="Source_20_Text"><text:span text:style-name="T3"># Upgrade system packages</text:span></text:span></text:p>
      <text:p text:style-name="Preformatted_20_Text"><text:span text:style-name="Source_20_Text"><text:span text:style-name="T3">sudo apt upgrade -y</text:span></text:span></text:p>
      <text:p text:style-name="P42" loext:marker-style-name="T3"/>
      <text:p text:style-name="Preformatted_20_Text"><text:span text:style-name="Source_20_Text"><text:span text:style-name="T3"># Install essential packages</text:span></text:span></text:p>
      <text:p text:style-name="P43"><text:span text:style-name="Source_20_Text"><text:span text:style-name="T3">sudo apt install -y curl wget git vim htop</text:span></text:span></text:p>
      <text:h text:style-name="P9" text:outline-level="3" loext:marker-style-name="T5"><text:span text:style-name="T3">8.2 Performance Optimization</text:span><text:span text:style-name="T3"/></text:h>
      <text:p text:style-name="Preformatted_20_Text"><text:span text:style-name="Source_20_Text"><text:span text:style-name="T3"># Check current governor</text:span></text:span></text:p>
      <text:p text:style-name="Preformatted_20_Text"><text:span text:style-name="Source_20_Text"><text:span text:style-name="T3">cat /sys/devices/system/cpu/cpu0/cpufreq/scaling_governor</text:span></text:span></text:p>
      <text:p text:style-name="P42" loext:marker-style-name="T3"/>
      <text:p text:style-name="Preformatted_20_Text"><text:span text:style-name="Source_20_Text"><text:span text:style-name="T3"># Set performance governor</text:span></text:span></text:p>
      <text:p text:style-name="P43"><text:span text:style-name="Source_20_Text"><text:span text:style-name="T3">echo performance | sudo tee /sys/devices/system/cpu/cpu*/cpufreq/scaling_governor</text:span></text:span></text:p>
      <text:h text:style-name="P2" text:outline-level="2"><text:span text:style-name="Strong_20_Emphasis"><text:span text:style-name="T2">9. Troubleshooting</text:span></text:span></text:h>
      <text:h text:style-name="P9" text:outline-level="3" loext:marker-style-name="T5"><text:span text:style-name="T3">9.1 Common Issues and Solutions</text:span><text:span text:style-name="T3"/></text:h>
      <text:p text:style-name="Text_20_body" loext:marker-style-name="T5"><text:span text:style-name="T3">This section covers the most frequently encountered problems and their solutions when working with the StarFive VisionFive 2.</text:span><text:span text:style-name="T3"/></text:p>
      <text:h text:style-name="P9" text:outline-level="3" loext:marker-style-name="T5"><text:span text:style-name="T3">9.2 Boot Issues</text:span><text:span text:style-name="T3"/></text:h>
      <text:p text:style-name="Text_20_body"><text:span text:style-name="Strong_20_Emphasis"><text:span text:style-name="T3">Problem</text:span></text:span><text:span text:style-name="T3">: Board doesn't boot from SD card</text:span></text:p>
      <text:p text:style-name="Text_20_body"><text:span text:style-name="Strong_20_Emphasis"><text:span text:style-name="T3">Solutions</text:span></text:span><text:span text:style-name="T3">:</text:span></text:p>
      <text:list text:style-name="WWNum32">
        <text:list-item>
          <text:p text:style-name="P61" loext:marker-style-name="T5"><text:span text:style-name="T3">Verify boot pins are set correctly </text:span><text:span text:style-name="T3"/></text:p>
        </text:list-item>
        <text:list-item>
          <text:p text:style-name="P61" loext:marker-style-name="T5"><text:span text:style-name="T3">Re-flash the SD card </text:span><text:span text:style-name="T3"/></text:p>
        </text:list-item>
        <text:list-item>
          <text:p text:style-name="P61" loext:marker-style-name="T5"><text:span text:style-name="T3">Try a different MicroSD card </text:span><text:span text:style-name="T3"/></text:p>
        </text:list-item>
        <text:list-item>
          <text:p text:style-name="P62" loext:marker-style-name="T5"><text:span text:style-name="T3">Check power supply (ensure 5V/3A minimum) </text:span><text:span text:style-name="T3"/></text:p>
        </text:list-item>
      </text:list>
      <text:h text:style-name="P9" text:outline-level="3" loext:marker-style-name="T5"><text:span text:style-name="T3">9.3 Display Issues</text:span><text:span text:style-name="T3"/></text:h>
      <text:p text:style-name="Text_20_body"><text:span text:style-name="Strong_20_Emphasis"><text:span text:style-name="T3">Problem</text:span></text:span><text:span text:style-name="T3">: No HDMI output</text:span></text:p>
      <text:p text:style-name="Text_20_body"><text:soft-page-break/><text:span text:style-name="Strong_20_Emphasis"><text:span text:style-name="T3">Solutions</text:span></text:span><text:span text:style-name="T3">:</text:span></text:p>
      <text:list text:style-name="WWNum33">
        <text:list-item>
          <text:p text:style-name="P63" loext:marker-style-name="T5"><text:span text:style-name="T3">Check HDMI cable connections </text:span><text:span text:style-name="T3"/></text:p>
        </text:list-item>
        <text:list-item>
          <text:p text:style-name="P63" loext:marker-style-name="T5"><text:span text:style-name="T3">Try a different monitor </text:span><text:span text:style-name="T3"/></text:p>
        </text:list-item>
        <text:list-item>
          <text:p text:style-name="P63" loext:marker-style-name="T5"><text:span text:style-name="T3">Verify monitor supports the resolution </text:span><text:span text:style-name="T3"/></text:p>
        </text:list-item>
        <text:list-item>
          <text:p text:style-name="P64" loext:marker-style-name="T5"><text:span text:style-name="T3">Check boot messages via serial console </text:span><text:span text:style-name="T3"/></text:p>
        </text:list-item>
      </text:list>
      <text:h text:style-name="P9" text:outline-level="3" loext:marker-style-name="T5"><text:span text:style-name="T3">9.4 Performance Issues</text:span><text:span text:style-name="T3"/></text:h>
      <text:p text:style-name="Text_20_body"><text:span text:style-name="Strong_20_Emphasis"><text:span text:style-name="T3">Problem</text:span></text:span><text:span text:style-name="T3">: System running slowly</text:span></text:p>
      <text:p text:style-name="Text_20_body"><text:span text:style-name="Strong_20_Emphasis"><text:span text:style-name="T3">Solutions</text:span></text:span><text:span text:style-name="T3">:</text:span></text:p>
      <text:list text:style-name="WWNum34">
        <text:list-item>
          <text:p text:style-name="P65" loext:marker-style-name="T5"><text:span text:style-name="T3">Use a faster MicroSD card (Class 10 or better) </text:span><text:span text:style-name="T3"/></text:p>
        </text:list-item>
        <text:list-item>
          <text:p text:style-name="P65" loext:marker-style-name="T5"><text:span text:style-name="T3">Set CPU governor to performance mode </text:span><text:span text:style-name="T3"/></text:p>
        </text:list-item>
        <text:list-item>
          <text:p text:style-name="P65" loext:marker-style-name="T5"><text:span text:style-name="T3">Ensure adequate cooling </text:span><text:span text:style-name="T3"/></text:p>
        </text:list-item>
        <text:list-item>
          <text:p text:style-name="P66" loext:marker-style-name="T5"><text:span text:style-name="T3">Check for background processes </text:span></text:p>
        </text:list-item>
      </text:list>
      <text:h text:style-name="P2" text:outline-level="2"><text:span text:style-name="Strong_20_Emphasis"><text:span text:style-name="T2">10. Getting Help</text:span></text:span></text:h>
      <text:h text:style-name="P9" text:outline-level="3" loext:marker-style-name="T5"><text:span text:style-name="T3">10.1 Official Resources</text:span><text:span text:style-name="T3"/></text:h>
      <text:list text:style-name="WWNum35">
        <text:list-item>
          <text:p text:style-name="P67"><text:span text:style-name="Strong_20_Emphasis"><text:span text:style-name="T3">StarFive Documentation</text:span></text:span><text:span text:style-name="T3">: https://doc-en.rvspace.org/ </text:span></text:p>
        </text:list-item>
        <text:list-item>
          <text:p text:style-name="P67"><text:span text:style-name="Strong_20_Emphasis"><text:span text:style-name="T3">Ubuntu RISC-V Team</text:span></text:span><text:span text:style-name="T3">: https://wiki.ubuntu.com/RISC-V </text:span></text:p>
        </text:list-item>
        <text:list-item>
          <text:p text:style-name="P68"><text:span text:style-name="Strong_20_Emphasis"><text:span text:style-name="T3">Debian RISC-V Port</text:span></text:span><text:span text:style-name="T3">: https://wiki.debian.org/RISC-V </text:span></text:p>
        </text:list-item>
      </text:list>
      <text:h text:style-name="P9" text:outline-level="3" loext:marker-style-name="T5"><text:span text:style-name="T3">10.2 Community Support</text:span><text:span text:style-name="T3"/></text:h>
      <text:list text:style-name="WWNum36">
        <text:list-item>
          <text:p text:style-name="P69"><text:span text:style-name="Strong_20_Emphasis"><text:span text:style-name="T3">RVspace Forum</text:span></text:span><text:span text:style-name="T3">: https://forum.rvspace.org/ </text:span></text:p>
        </text:list-item>
        <text:list-item>
          <text:p text:style-name="P69"><text:span text:style-name="Strong_20_Emphasis"><text:span text:style-name="T3">Ubuntu Community</text:span></text:span><text:span text:style-name="T3">: https://discourse.ubuntu.com/ </text:span></text:p>
        </text:list-item>
        <text:list-item>
          <text:p text:style-name="P70"><text:span text:style-name="Strong_20_Emphasis"><text:span text:style-name="T3">RISC-V International</text:span></text:span><text:span text:style-name="T3">: https://riscv.org/ </text:span></text:p>
        </text:list-item>
      </text:list>
      <text:h text:style-name="P9" text:outline-level="3" loext:marker-style-name="T5"><text:span text:style-name="T3">10.3 Diagnostic Commands</text:span><text:span text:style-name="T3"/></text:h>
      <text:p text:style-name="Preformatted_20_Text"><text:span text:style-name="Source_20_Text"><text:span text:style-name="T3"># Check system information</text:span></text:span></text:p>
      <text:p text:style-name="Preformatted_20_Text"><text:span text:style-name="Source_20_Text"><text:span text:style-name="T3">uname -a</text:span></text:span></text:p>
      <text:p text:style-name="P42" loext:marker-style-name="T3"/>
      <text:p text:style-name="Preformatted_20_Text"><text:span text:style-name="Source_20_Text"><text:span text:style-name="T3"># Check hardware information</text:span></text:span></text:p>
      <text:p text:style-name="Preformatted_20_Text"><text:span text:style-name="Source_20_Text"><text:span text:style-name="T3">lscpu</text:span></text:span></text:p>
      <text:p text:style-name="P42" loext:marker-style-name="T3"/>
      <text:p text:style-name="Preformatted_20_Text"><text:span text:style-name="Source_20_Text"><text:span text:style-name="T3"># Check memory usage</text:span></text:span></text:p>
      <text:p text:style-name="Preformatted_20_Text"><text:span text:style-name="Source_20_Text"><text:span text:style-name="T3">free -h</text:span></text:span></text:p>
      <text:p text:style-name="P42" loext:marker-style-name="T3"><text:soft-page-break/></text:p>
      <text:p text:style-name="Preformatted_20_Text"><text:span text:style-name="Source_20_Text"><text:span text:style-name="T3"># Check disk usage</text:span></text:span></text:p>
      <text:p text:style-name="Preformatted_20_Text"><text:span text:style-name="Source_20_Text"><text:span text:style-name="T3">df -h</text:span></text:span></text:p>
      <text:p text:style-name="P42" loext:marker-style-name="T3"/>
      <text:p text:style-name="Preformatted_20_Text"><text:span text:style-name="Source_20_Text"><text:span text:style-name="T3"># Check system logs</text:span></text:span></text:p>
      <text:p text:style-name="P43"><text:span text:style-name="Source_20_Text"><text:span text:style-name="T3">journalctl -f</text:span></text:span></text:p>
      <text:h text:style-name="P2" text:outline-level="2"><text:span text:style-name="Strong_20_Emphasis"><text:span text:style-name="T2">11. Conclusion</text:span></text:span></text:h>
      <text:p text:style-name="Text_20_body" loext:marker-style-name="T5"><text:span text:style-name="T3">The StarFive VisionFive 2 represents an exciting step forward in open-source hardware development. With proper installation and configuration, it provides an excellent platform for exploring RISC-V architecture, developing Linux applications, and contributing to the growing RISC-V ecosystem.</text:span><text:span text:style-name="T3"/></text:p>
      <text:p text:style-name="Text_20_body" loext:marker-style-name="T5"><text:span text:style-name="T3">Whether you're a student learning about computer architecture, a developer working on embedded systems, or an enthusiast exploring new technologies, the VisionFive 2 offers a unique and powerful computing experience.</text:span><text:span text:style-name="T3"/></text:p>
      <text:p text:style-name="P6" loext:marker-style-name="T3"/>
      <text:p text:style-name="P71" loext:marker-style-name="T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DejaVu Sans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DejaVu Sans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DejaVu Sans" style:font-family-asian="'DejaVu Sans'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DejaVu Sans" style:font-family-asian="'DejaVu Sans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DejaVu Sans" style:font-family-asian="'DejaVu Sans'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DejaVu Sans" style:font-family-asian="'DejaVu Sans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DejaVu Sans" style:font-family-asian="'DejaVu Sans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list-level="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list-level="1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list-level="1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4" style:list-level="1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5" style:list-level="1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6" style:list-level="1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use-window-font-color="true" loext:opacity="0%" style:font-name="Courier" fo:font-family="Courier" style:font-family-generic="roman" style:font-pitch="variable" fo:font-size="10pt" fo:language="en" fo:country="US" style:letter-kerning="false" style:font-name-asian="DejaVu Sans" style:font-family-asian="'DejaVu Sans'" style:font-family-generic-asian="system" style:font-pitch-asian="variable" style:font-size-asian="10pt" style:language-asian="en" style:country-asian="US" style:font-name-complex="Noto Sans Arabic" style:font-family-complex="'Noto Sans Arabic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_20_Contents" style:display-name="Frame Contents" style:family="paragraph" style:parent-style-name="Standard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DejaVu Sans" style:font-family-asian="'DejaVu Sans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DejaVu Sans" style:font-family-asian="'DejaVu Sans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DejaVu Sans" style:font-family-asian="'DejaVu Sans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54" style:display-name="ListLabel 154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71" style:display-name="ListLabel 171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72" style:display-name="ListLabel 172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74" style:display-name="ListLabel 174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75" style:display-name="ListLabel 175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77" style:display-name="ListLabel 177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78" style:display-name="ListLabel 178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80" style:display-name="ListLabel 180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81" style:display-name="ListLabel 181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84" style:display-name="ListLabel 184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86" style:display-name="ListLabel 186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87" style:display-name="ListLabel 187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237" style:display-name="ListLabel 237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238" style:display-name="ListLabel 238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240" style:display-name="ListLabel 240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241" style:display-name="ListLabel 241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243" style:display-name="ListLabel 243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263" style:display-name="ListLabel 263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264" style:display-name="ListLabel 264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265" style:display-name="ListLabel 265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266" style:display-name="ListLabel 266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267" style:display-name="ListLabel 267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268" style:display-name="ListLabel 268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269" style:display-name="ListLabel 269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270" style:display-name="ListLabel 270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308" style:display-name="ListLabel 308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309" style:display-name="ListLabel 309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310" style:display-name="ListLabel 310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311" style:display-name="ListLabel 311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312" style:display-name="ListLabel 312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313" style:display-name="ListLabel 313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314" style:display-name="ListLabel 314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315" style:display-name="ListLabel 315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316" style:display-name="ListLabel 316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317" style:display-name="ListLabel 317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318" style:display-name="ListLabel 318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319" style:display-name="ListLabel 319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320" style:display-name="ListLabel 320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321" style:display-name="ListLabel 321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322" style:display-name="ListLabel 322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323" style:display-name="ListLabel 323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324" style:display-name="ListLabel 324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fo:color="#000000" loext:opacity="100%" style:font-name="Calibri" fo:font-family="Calibri" style:font-family-generic="roman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Wingdings"/>
      </text:list-level-style-bullet>
      <text:list-level-style-bullet text:level="2" text:style-name="ListLabel_20_65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Wingdings"/>
      </text:list-level-style-bullet>
      <text:list-level-style-bullet text:level="3" text:style-name="ListLabel_20_66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Wingdings"/>
      </text:list-level-style-bullet>
      <text:list-level-style-bullet text:level="4" text:style-name="ListLabel_20_67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Wingdings"/>
      </text:list-level-style-bullet>
      <text:list-level-style-bullet text:level="5" text:style-name="ListLabel_20_68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Wingdings"/>
      </text:list-level-style-bullet>
      <text:list-level-style-bullet text:level="6" text:style-name="ListLabel_20_69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Wingdings"/>
      </text:list-level-style-bullet>
      <text:list-level-style-bullet text:level="7" text:style-name="ListLabel_20_7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Wingdings"/>
      </text:list-level-style-bullet>
      <text:list-level-style-bullet text:level="8" text:style-name="ListLabel_20_7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Wingdings"/>
      </text:list-level-style-bullet>
      <text:list-level-style-bullet text:level="9" text:style-name="ListLabel_20_72" loext:num-list-format="" style:num-suffix="" text:bullet-char="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2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2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2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2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2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2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2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2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3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3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3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3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3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3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3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3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3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3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3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3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2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2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2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3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3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3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3T23:15:00</meta:creation-date>
    <meta:initial-creator>python-docx</meta:initial-creator>
    <dc:description>generated by python-docx</dc:description>
    <dc:language>en-US</dc:language>
    <dc:date>2025-07-16T11:58:48.159576123</dc:date>
    <meta:editing-cycles>9</meta:editing-cycles>
    <meta:editing-duration>PT2H3M33S</meta:editing-duration>
    <meta:generator>LibreOffice/24.8.7.2$Linux_X86_64 LibreOffice_project/f4f281f562fb585d46b0af5755dfe1eb6adc047f</meta:generator>
    <meta:document-statistic meta:table-count="0" meta:image-count="0" meta:object-count="0" meta:page-count="11" meta:paragraph-count="277" meta:word-count="1679" meta:character-count="10996" meta:non-whitespace-character-count="9595"/>
    <meta:user-defined meta:name="AppVersion">15.0000</meta:user-defined>
    <meta:template xlink:type="simple" xlink:actuate="onRequest" xlink:title="Normal.dotm" xlink:href=""/>
  </office:meta>
</office:document-meta>
</file>