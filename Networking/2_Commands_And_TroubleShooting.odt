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1"/>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2"/>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etwork Configuration for StarFive VisionFive 2</text:h>
      <text:h text:style-name="Heading_20_2" text:outline-level="2">Basic Network Configuration</text:h>
      <text:h text:style-name="Heading_20_3" text:outline-level="3">For Dynamic IP Addressing:</text:h>
      <text:p text:style-name="Preformatted_20_Text"><text:span text:style-name="Source_20_Text"># Check network status</text:span></text:p>
      <text:p text:style-name="Preformatted_20_Text"><text:span text:style-name="Source_20_Text">ip addr show</text:span></text:p>
      <text:p text:style-name="Preformatted_20_Text"/>
      <text:p text:style-name="Preformatted_20_Text"><text:span text:style-name="Source_20_Text">sudo ip link set end0 up</text:span></text:p>
      <text:p text:style-name="Preformatted_20_Text"><text:span text:style-name="Source_20_Text">sudo dhclient end0</text:span></text:p>
      <text:p text:style-name="Preformatted_20_Text"/>
      <text:p text:style-name="Preformatted_20_Text"><text:span text:style-name="Source_20_Text"># To show all the addresses</text:span></text:p>
      <text:p text:style-name="Preformatted_20_Text"><text:span text:style-name="Source_20_Text">ip a</text:span></text:p>
      <text:p text:style-name="Preformatted_20_Text"/>
      <text:p text:style-name="Preformatted_20_Text"><text:span text:style-name="Source_20_Text"># Enter this below given command and then check the network configuration file</text:span></text:p>
      <text:p text:style-name="Preformatted_20_Text"><text:span text:style-name="Source_20_Text">sudo nano /etc/network/interfaces</text:span></text:p>
      <text:p text:style-name="Preformatted_20_Text"/>
      <text:p text:style-name="Preformatted_20_Text"><text:span text:style-name="Source_20_Text"># To save changes "ctrl+o", then "enter" and after that press "ctrl+x" to exit</text:span></text:p>
      <text:p text:style-name="Preformatted_20_Text"/>
      <text:p text:style-name="Preformatted_20_Text"><text:span text:style-name="Source_20_Text"># to apply changes</text:span></text:p>
      <text:p text:style-name="Preformatted_20_Text"><text:span text:style-name="Source_20_Text">sudo systemctl restart networking</text:span></text:p>
      <text:p text:style-name="Preformatted_20_Text"/>
      <text:p text:style-name="Preformatted_20_Text"><text:span text:style-name="Source_20_Text"># To check if the network has been configured</text:span></text:p>
      <text:p text:style-name="P1"><text:span text:style-name="Source_20_Text">ping -c 3 google.com</text:span></text:p>
      <text:h text:style-name="Heading_20_3" text:outline-level="3">For Static IP Addressing:</text:h>
      <text:p text:style-name="Preformatted_20_Text"><text:span text:style-name="Source_20_Text"># Check network status</text:span></text:p>
      <text:p text:style-name="Preformatted_20_Text"><text:span text:style-name="Source_20_Text">ip a</text:span></text:p>
      <text:p text:style-name="Preformatted_20_Text"/>
      <text:p text:style-name="Preformatted_20_Text"><text:span text:style-name="Source_20_Text"># See configuration file after running this below given command</text:span></text:p>
      <text:p text:style-name="Preformatted_20_Text"><text:span text:style-name="Source_20_Text">sudo nano /etc/network/interfaces</text:span></text:p>
      <text:p text:style-name="Preformatted_20_Text"/>
      <text:p text:style-name="Preformatted_20_Text"><text:span text:style-name="Source_20_Text"># To save changes "ctrl+o", then "enter" and after that press "ctrl+x" to exit</text:span></text:p>
      <text:p text:style-name="Preformatted_20_Text"/>
      <text:p text:style-name="Preformatted_20_Text"><text:span text:style-name="Source_20_Text"># To apply changes use this command for the port name that is up which you will see in the network status</text:span></text:p>
      <text:p text:style-name="Preformatted_20_Text"><text:span text:style-name="Source_20_Text">sudo ifdown end0 || true</text:span></text:p>
      <text:p text:style-name="Preformatted_20_Text"><text:span text:style-name="Source_20_Text">sudo ifup end0</text:span></text:p>
      <text:p text:style-name="Preformatted_20_Text"/>
      <text:p text:style-name="P1"><text:span text:style-name="Source_20_Text">sudo systemctl restart networking</text:span></text:p>
      <text:h text:style-name="Heading_20_2" text:outline-level="2">SSH Access Setup</text:h>
      <text:p text:style-name="Preformatted_20_Text"><text:span text:style-name="Source_20_Text"># Enable SSH service</text:span></text:p>
      <text:p text:style-name="Preformatted_20_Text"><text:span text:style-name="Source_20_Text">sudo systemctl enable ssh</text:span></text:p>
      <text:p text:style-name="Preformatted_20_Text"><text:span text:style-name="Source_20_Text">sudo systemctl start ssh</text:span></text:p>
      <text:p text:style-name="Preformatted_20_Text"/>
      <text:p text:style-name="Preformatted_20_Text"><text:span text:style-name="Source_20_Text"># Check SSH status</text:span></text:p>
      <text:p text:style-name="Preformatted_20_Text"><text:span text:style-name="Source_20_Text">sudo systemctl status ssh</text:span></text:p>
      <text:p text:style-name="Preformatted_20_Text"/>
      <text:p text:style-name="Preformatted_20_Text"><text:span text:style-name="Source_20_Text"># Find IP address for remote access</text:span></text:p>
      <text:p text:style-name="P1"><text:span text:style-name="Source_20_Text">hostname -I</text:span></text:p>
      <text:h text:style-name="Heading_20_2" text:outline-level="2"><text:soft-page-break/>Network Troubleshooting</text:h>
      <text:h text:style-name="Heading_20_3" text:outline-level="3">Common Network Issues</text:h>
      <text:p text:style-name="Text_20_body"><text:span text:style-name="Strong_20_Emphasis">Problem</text:span>: No network connectivity</text:p>
      <text:p text:style-name="Text_20_body"><text:span text:style-name="Strong_20_Emphasis">Solutions</text:span>:</text:p>
      <text:list text:style-name="L1">
        <text:list-item>
          <text:p text:style-name="P2">Check Ethernet cable </text:p>
        </text:list-item>
        <text:list-item>
          <text:p text:style-name="P2">Verify network configuration </text:p>
        </text:list-item>
        <text:list-item>
          <text:p text:style-name="P2">Restart network service: <text:span text:style-name="Source_20_Text">sudo systemctl restart networking</text:span> </text:p>
        </text:list-item>
        <text:list-item>
          <text:p text:style-name="P3">Check for driver issues in system logs </text:p>
        </text:list-item>
      </text:list>
      <text:h text:style-name="Heading_20_3" text:outline-level="3">SSH Connection Issues</text:h>
      <text:p text:style-name="Text_20_body"><text:span text:style-name="Strong_20_Emphasis">Problem</text:span>: Cannot connect via SSH</text:p>
      <text:p text:style-name="Text_20_body"><text:span text:style-name="Strong_20_Emphasis">Solutions</text:span>:</text:p>
      <text:list text:style-name="L2">
        <text:list-item>
          <text:p text:style-name="P4">Verify SSH service is running </text:p>
        </text:list-item>
        <text:list-item>
          <text:p text:style-name="P4">Check firewall settings </text:p>
        </text:list-item>
        <text:list-item>
          <text:p text:style-name="P4">Confirm IP address </text:p>
        </text:list-item>
        <text:list-item>
          <text:p text:style-name="P5">Try connecting from local network first </text:p>
        </text:list-item>
      </text:list>
      <text:h text:style-name="Heading_20_2" text:outline-level="2">Comprehensive Networking Troubleshooting</text:h>
      <text:h text:style-name="Heading_20_3" text:outline-level="3">Service Initialization Failures</text:h>
      <text:p text:style-name="Text_20_body">The networking.service demonstrated consistent failure patterns during system startup, primarily attributed to configuration file corruption and parameter validation errors. Investigation revealed several critical issues within the network interface configuration:</text:p>
      <text:p text:style-name="Text_20_body">Invalid netmask specifications such as 255.255.254.245 resulted in service rejection due to improper subnet mask formatting. Additionally, gateway assignments pointing to network addresses (e.g., 192.168.1.0) rather than valid host addresses caused routing table conflicts. Syntax violations in the /etc/network/interfaces file, including improper indentation and spacing inconsistencies, further contributed to parsing failures.</text:p>
      <text:p text:style-name="Text_20_body">Resolution required implementation of RFC-compliant netmask values (255.255.254.0) and verification that gateway addresses resided within the configured subnet range. For instance, an IP address of 172.16.11.192/23 necessitated a gateway within the 172.16.10.0/23 network range, such as 172.16.10.1. Strict adherence to configuration file syntax requirements eliminated parsing errors.</text:p>
      <text:h text:style-name="Heading_20_3" text:outline-level="3">Interface Configuration Recognition Issues</text:h>
      <text:p text:style-name="Text_20_body">The system consistently returned "ifup: Interface not configured" errors despite proper interface definitions in the configuration files. Analysis indicated that the end1 interface was configured with allow-hotplug directives without corresponding physical link establishment. Additionally, interface name mismatches between configuration files and actual hardware identifiers contributed to recognition failures.</text:p>
      <text:p text:style-name="Text_20_body"><text:soft-page-break/>Troubleshooting methodology involved physical connectivity verification and interface enumeration using ip link commands. Resolution required either establishing physical connections for hotplug-enabled interfaces or removing allow-hotplug directives for unused interfaces. Interface name validation against system hardware identifiers ensured configuration consistency.</text:p>
      <text:h text:style-name="Heading_20_3" text:outline-level="3">Routing Table Conflicts</text:h>
      <text:p text:style-name="Text_20_body">The system generated "RTNETLINK: File exists" errors during interface activation, indicating duplicate routing table entries. Investigation revealed that both network interfaces attempted to establish default gateway routes, creating conflicting entries in the kernel routing table.</text:p>
      <text:p text:style-name="Text_20_body">Resolution involved designating a single interface (typically end0) as the default gateway handler while removing gateway specifications from secondary interfaces. This approach eliminated routing conflicts and established proper network hierarchy.</text:p>
      <text:h text:style-name="Heading_20_3" text:outline-level="3">Gateway Connectivity Failures</text:h>
      <text:p text:style-name="Text_20_body">Despite successful IP configuration, gateway ping operations resulted in 100% packet loss, indicating Layer 2 or Layer 3 connectivity issues. Diagnostic procedures included physical link verification using /sys/class/net/end0/carrier status monitoring, where a return value of 1 indicates established physical connectivity.</text:p>
      <text:p text:style-name="Text_20_body">Network topology verification revealed subnet configuration mismatches between assigned IP addresses and gateway locations. Resolution required comprehensive subnet analysis and IP address reassignment to ensure gateway reachability within the configured network segment.</text:p>
      <text:h text:style-name="Heading_20_3" text:outline-level="3">Subnet Configuration Misalignment</text:h>
      <text:p text:style-name="Text_20_body">Critical subnet calculation errors resulted in gateway unreachability scenarios. Specifically, gateway assignment to 172.16.0.3 while maintaining host IP configurations within the 172.16.10.0/23 range created routing impossibilities due to subnet boundary violations.</text:p>
      <text:p text:style-name="Text_20_body">Resolution involved network topology recalculation and IP address reassignment to align with actual gateway subnet requirements. Implementation of 172.16.0.100/24 configuration parameters established proper subnet alignment and gateway accessibility.</text:p>
      <text:h text:style-name="Heading_20_3" text:outline-level="3">Interface Activation Failures</text:h>
      <text:p text:style-name="Text_20_body">Post-configuration analysis revealed that the end0 interface remained inactive despite resolution of previous issues. Investigation identified missing interface activation directives and nomenclature inconsistencies within the configuration files.</text:p>
      <text:p text:style-name="Text_20_body">Systematic verification of /etc/network/interfaces file structure ensured proper inclusion of auto or allow-hotplug directives corresponding to each configured interface. Cross-referencing with ip link show output validated interface naming consistency throughout the configuration.</text:p>
      <text:h text:style-name="Heading_20_2" text:outline-level="2">Network Diagnostic Commands</text:h>
      <text:p text:style-name="Preformatted_20_Text"><text:span text:style-name="Source_20_Text"># Check network status</text:span></text:p>
      <text:p text:style-name="Preformatted_20_Text"><text:span text:style-name="Source_20_Text">ip addr show</text:span></text:p>
      <text:p text:style-name="Preformatted_20_Text"><text:span text:style-name="Source_20_Text">ip a</text:span></text:p>
      <text:p text:style-name="Preformatted_20_Text"/>
      <text:p text:style-name="Preformatted_20_Text"><text:soft-page-break/><text:span text:style-name="Source_20_Text"># Check network interface status</text:span></text:p>
      <text:p text:style-name="Preformatted_20_Text"><text:span text:style-name="Source_20_Text">ip link show</text:span></text:p>
      <text:p text:style-name="Preformatted_20_Text"/>
      <text:p text:style-name="Preformatted_20_Text"><text:span text:style-name="Source_20_Text"># Check routing table</text:span></text:p>
      <text:p text:style-name="Preformatted_20_Text"><text:span text:style-name="Source_20_Text">ip route</text:span></text:p>
      <text:p text:style-name="Preformatted_20_Text"/>
      <text:p text:style-name="Preformatted_20_Text"><text:span text:style-name="Source_20_Text"># Check physical connectivity</text:span></text:p>
      <text:p text:style-name="Preformatted_20_Text"><text:span text:style-name="Source_20_Text">cat /sys/class/net/end0/carrier</text:span></text:p>
      <text:p text:style-name="Preformatted_20_Text"/>
      <text:p text:style-name="Preformatted_20_Text"><text:span text:style-name="Source_20_Text"># Test network connectivity</text:span></text:p>
      <text:p text:style-name="Preformatted_20_Text"><text:span text:style-name="Source_20_Text">ping -c 3 google.com</text:span></text:p>
      <text:p text:style-name="Preformatted_20_Text"/>
      <text:p text:style-name="Preformatted_20_Text"><text:span text:style-name="Source_20_Text"># Restart networking service</text:span></text:p>
      <text:p text:style-name="Preformatted_20_Text"><text:span text:style-name="Source_20_Text">sudo systemctl restart networking</text:span></text:p>
      <text:p text:style-name="Preformatted_20_Text"/>
      <text:p text:style-name="Preformatted_20_Text"><text:span text:style-name="Source_20_Text"># Check networking service status</text:span></text:p>
      <text:p text:style-name="P1"><text:span text:style-name="Source_20_Text">sudo systemctl status networking</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6T11:33:44.650403343</meta:creation-date>
    <dc:date>2025-07-16T11:35:32.867989584</dc:date>
    <meta:editing-duration>PT1M49S</meta:editing-duration>
    <meta:editing-cycles>1</meta:editing-cycles>
    <meta:document-statistic meta:table-count="0" meta:image-count="0" meta:object-count="0" meta:page-count="4" meta:paragraph-count="85" meta:word-count="803" meta:character-count="6141" meta:non-whitespace-character-count="5423"/>
    <meta:generator>LibreOffice/24.8.7.2$Linux_X86_64 LibreOffice_project/f4f281f562fb585d46b0af5755dfe1eb6adc047f</meta:generator>
  </office:meta>
</office:document-meta>
</file>